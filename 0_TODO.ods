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Monospace" svg:font-family="Monospace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19.16mm"/>
    </style:style>
    <style:style style:name="co4" style:family="table-column">
      <style:table-column-properties fo:break-before="auto" style:column-width="98.51mm"/>
    </style:style>
    <style:style style:name="co5" style:family="table-column">
      <style:table-column-properties fo:break-before="auto" style:column-width="19.98mm"/>
    </style:style>
    <style:style style:name="co6" style:family="table-column">
      <style:table-column-properties fo:break-before="auto" style:column-width="48.42mm"/>
    </style:style>
    <style:style style:name="co7" style:family="table-column">
      <style:table-column-properties fo:break-before="auto" style:column-width="66.6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19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4.82mm" fo:break-before="auto" style:use-optimal-row-height="true"/>
    </style:style>
    <style:style style:name="ro6" style:family="table-row">
      <style:table-row-properties style:row-height="9.23mm" fo:break-before="auto" style:use-optimal-row-height="true"/>
    </style:style>
    <style:style style:name="ta1" style:family="table" style:master-page-name="cfg">
      <style:table-properties table:display="true" style:writing-mode="lr-tb"/>
    </style:style>
    <style:style style:name="ta2" style:family="table" style:master-page-name="Estructura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ff99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fo:border-bottom="none" fo:background-color="#ff0000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none" gnm:background-colour="#ff9966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47" style:family="table-cell" style:parent-style-name="Default">
      <style:table-cell-properties style:glyph-orientation-vertical="auto" fo:border-bottom="none" fo:background-color="#007fff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none" gnm:background-colour="#33cc66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fo:border-bottom="none" fo:background-color="#d27e2b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none" gnm:background-colour="#ff9966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none" gnm:background-colour="#e6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fo:border-bottom="none" fo:background-color="#ff9966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none" gnm:background-colour="#ff9966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fo:border-bottom="none" fo:background-color="#e6ff00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none" gnm:background-colour="#e6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ff99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order-bottom="none" fo:background-color="#ff9966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none" gnm:background-colour="#ff9966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fo:border-bottom="none" fo:background-color="#e6ff00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none" gnm:background-colour="#e6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order-bottom="none" fo:background-color="#007fff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none" gnm:background-colour="#33cc66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fo:border-bottom="none" fo:background-color="#ff0000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none" gnm:background-colour="#ff9966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fo:border-bottom="none" fo:background-color="#d27e2b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none" gnm:background-colour="#ff9966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none" gnm:background-colour="#e6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 style:font-size-asian="14pt" style:font-size-complex="14pt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51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cc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'TO-DO'.$D5]=&quot;Terminado&quot;)" style:apply-style-name="Estado_5f_Terminado_5f_Tachado" style:base-cell-address="'TO-DO'.A5"/>
      <style:map style:condition="is-true-formula(['TO-DO'.$D5]=&quot;En Proceso&quot;)" style:apply-style-name="Estado_5f_En_5f_Proceso" style:base-cell-address="'TO-DO'.A5"/>
    </style:style>
    <style:style style:name="ce21" style:family="table-cell" style:parent-style-name="Default" style:data-style-name="N10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'TO-DO'.$D5]=&quot;Terminado&quot;)" style:apply-style-name="Estado_5f_Terminado_5f_Tachado" style:base-cell-address="'TO-DO'.A5"/>
      <style:map style:condition="is-true-formula(['TO-DO'.$D5]=&quot;En Proceso&quot;)" style:apply-style-name="Estado_5f_En_5f_Proceso" style:base-cell-address="'TO-DO'.A5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margin-left="3.53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'TO-DO'.$D5]=&quot;Terminado&quot;)" style:apply-style-name="Estado_5f_Terminado_5f_Tachado" style:base-cell-address="'TO-DO'.A5"/>
      <style:map style:condition="is-true-formula(['TO-DO'.$D5]=&quot;En Proceso&quot;)" style:apply-style-name="Estado_5f_En_5f_Proceso" style:base-cell-address="'TO-DO'.A5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'TO-DO'.$D5]=&quot;Terminado&quot;)" style:apply-style-name="Estado_5f_Terminado_5f_Tachado" style:base-cell-address="'TO-DO'.A5"/>
      <style:map style:condition="is-true-formula(['TO-DO'.$D5]=&quot;En Proceso&quot;)" style:apply-style-name="Estado_5f_En_5f_Proceso" style:base-cell-address="'TO-DO'.A5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3.53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'TO-DO'.$D5]=&quot;Terminado&quot;)" style:apply-style-name="Estado_5f_Terminado_5f_Tachado" style:base-cell-address="'TO-DO'.A5"/>
      <style:map style:condition="is-true-formula(['TO-DO'.$D5]=&quot;En Proceso&quot;)" style:apply-style-name="Estado_5f_En_5f_Proceso" style:base-cell-address="'TO-DO'.A5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7.06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'TO-DO'.$D5]=&quot;Terminado&quot;)" style:apply-style-name="Estado_5f_Terminado_5f_Tachado" style:base-cell-address="'TO-DO'.A5"/>
      <style:map style:condition="is-true-formula(['TO-DO'.$D5]=&quot;En Proceso&quot;)" style:apply-style-name="Estado_5f_En_5f_Proceso" style:base-cell-address="'TO-DO'.A5"/>
    </style:style>
    <style:style style:name="ce35" style:family="table-cell" style:parent-style-name="Estado_5f_Terminado">
      <style:table-cell-properties style:glyph-orientation-vertical="auto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'TO-DO'.$D5]=&quot;Terminado&quot;)" style:apply-style-name="Estado_5f_Terminado_5f_Tachado" style:base-cell-address="'TO-DO'.A5"/>
      <style:map style:condition="is-true-formula(['TO-DO'.$D5]=&quot;En Proceso&quot;)" style:apply-style-name="Estado_5f_En_5f_Proceso" style:base-cell-address="'TO-DO'.A5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  <style:map style:condition="is-true-formula(['TO-DO'.$D5]=&quot;Terminado&quot;)" style:apply-style-name="Estado_5f_Terminado_5f_Tachado" style:base-cell-address="'TO-DO'.A5"/>
      <style:map style:condition="is-true-formula(['TO-DO'.$D5]=&quot;En Proceso&quot;)" style:apply-style-name="Estado_5f_En_5f_Proceso" style:base-cell-address="'TO-DO'.A5"/>
    </style:style>
    <style:style style:name="ce37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wrap" fo:border="0.06pt solid #000000" style:rotation-angle="0" style:rotation-align="none" style:shrink-to-fit="false" gnm:background-colour="#ffffcc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  <style:map style:condition="is-true-formula(['TO-DO'.$D5]=&quot;Terminado&quot;)" style:apply-style-name="Estado_5f_Terminado_5f_Tachado" style:base-cell-address="'TO-DO'.A5"/>
      <style:map style:condition="is-true-formula(['TO-DO'.$D5]=&quot;En Proceso&quot;)" style:apply-style-name="Estado_5f_En_5f_Proceso" style:base-cell-address="'TO-DO'.A5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'TO-DO'.$D5]=&quot;Terminado&quot;)" style:apply-style-name="Estado_5f_Terminado_5f_Tachado" style:base-cell-address="'TO-DO'.B5"/>
      <style:map style:condition="is-true-formula(['TO-DO'.$D5]=&quot;En Proceso&quot;)" style:apply-style-name="Estado_5f_En_5f_Proceso" style:base-cell-address="'TO-DO'.B5"/>
    </style:style>
    <style:style style:name="ce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'TO-DO'.$D6]=&quot;Terminado&quot;)" style:apply-style-name="Estado_5f_Terminado_5f_Tachado" style:base-cell-address="'TO-DO'.B6"/>
      <style:map style:condition="is-true-formula(['TO-DO'.$D6]=&quot;En Proceso&quot;)" style:apply-style-name="Estado_5f_En_5f_Proceso" style:base-cell-address="'TO-DO'.B6"/>
    </style:style>
    <style:style style:name="ce39" style:family="table-cell" style:parent-style-name="Default" style:data-style-name="N10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'TO-DO'.$D5]=&quot;Terminado&quot;)" style:apply-style-name="Estado_5f_Terminado_5f_Tachado" style:base-cell-address="'TO-DO'.B5"/>
      <style:map style:condition="is-true-formula(['TO-DO'.$D5]=&quot;En Proceso&quot;)" style:apply-style-name="Estado_5f_En_5f_Proceso" style:base-cell-address="'TO-DO'.B5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margin-left="3.53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'TO-DO'.$D5]=&quot;Terminado&quot;)" style:apply-style-name="Estado_5f_Terminado_5f_Tachado" style:base-cell-address="'TO-DO'.B5"/>
      <style:map style:condition="is-true-formula(['TO-DO'.$D5]=&quot;En Proceso&quot;)" style:apply-style-name="Estado_5f_En_5f_Proceso" style:base-cell-address="'TO-DO'.B5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'TO-DO'.$D5]=&quot;Terminado&quot;)" style:apply-style-name="Estado_5f_Terminado_5f_Tachado" style:base-cell-address="'TO-DO'.B5"/>
      <style:map style:condition="is-true-formula(['TO-DO'.$D5]=&quot;En Proceso&quot;)" style:apply-style-name="Estado_5f_En_5f_Proceso" style:base-cell-address="'TO-DO'.B5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3.53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'TO-DO'.$D5]=&quot;Terminado&quot;)" style:apply-style-name="Estado_5f_Terminado_5f_Tachado" style:base-cell-address="'TO-DO'.B5"/>
      <style:map style:condition="is-true-formula(['TO-DO'.$D5]=&quot;En Proceso&quot;)" style:apply-style-name="Estado_5f_En_5f_Proceso" style:base-cell-address="'TO-DO'.B5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7.06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'TO-DO'.$D5]=&quot;Terminado&quot;)" style:apply-style-name="Estado_5f_Terminado_5f_Tachado" style:base-cell-address="'TO-DO'.B5"/>
      <style:map style:condition="is-true-formula(['TO-DO'.$D5]=&quot;En Proceso&quot;)" style:apply-style-name="Estado_5f_En_5f_Proceso" style:base-cell-address="'TO-DO'.B5"/>
    </style:style>
    <style:style style:name="ce57" style:family="table-cell" style:parent-style-name="Estado_5f_Terminado">
      <style:table-cell-properties style:glyph-orientation-vertical="auto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'TO-DO'.$D5]=&quot;Terminado&quot;)" style:apply-style-name="Estado_5f_Terminado_5f_Tachado" style:base-cell-address="'TO-DO'.B5"/>
      <style:map style:condition="is-true-formula(['TO-DO'.$D5]=&quot;En Proceso&quot;)" style:apply-style-name="Estado_5f_En_5f_Proceso" style:base-cell-address="'TO-DO'.B5"/>
    </style:style>
    <style:style style:name="ce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  <style:map style:condition="is-true-formula(['TO-DO'.$D5]=&quot;Terminado&quot;)" style:apply-style-name="Estado_5f_Terminado_5f_Tachado" style:base-cell-address="'TO-DO'.B5"/>
      <style:map style:condition="is-true-formula(['TO-DO'.$D5]=&quot;En Proceso&quot;)" style:apply-style-name="Estado_5f_En_5f_Proceso" style:base-cell-address="'TO-DO'.B5"/>
    </style:style>
    <style:style style:name="ce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'TO-DO'.$D5]=&quot;Terminado&quot;)" style:apply-style-name="Estado_5f_Terminado_5f_Tachado" style:base-cell-address="'TO-DO'.B5"/>
      <style:map style:condition="is-true-formula(['TO-DO'.$D5]=&quot;En Proceso&quot;)" style:apply-style-name="Estado_5f_En_5f_Proceso" style:base-cell-address="'TO-DO'.B5"/>
    </style:style>
    <style:style style:name="ce60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wrap" fo:border="0.06pt solid #000000" style:rotation-angle="0" style:rotation-align="none" style:shrink-to-fit="false" gnm:background-colour="#ffffcc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  <style:map style:condition="is-true-formula(['TO-DO'.$D5]=&quot;Terminado&quot;)" style:apply-style-name="Estado_5f_Terminado_5f_Tachado" style:base-cell-address="'TO-DO'.B5"/>
      <style:map style:condition="is-true-formula(['TO-DO'.$D5]=&quot;En Proceso&quot;)" style:apply-style-name="Estado_5f_En_5f_Proceso" style:base-cell-address="'TO-DO'.B5"/>
    </style:style>
    <style:style style:name="ce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'TO-DO'.$D5]=&quot;Terminado&quot;)" style:apply-style-name="Estado_5f_Terminado" style:base-cell-address="'TO-DO'.C5"/>
      <style:map style:condition="cell-content()=&quot;Alta&quot;" style:apply-style-name="PR_5f_Alta" style:base-cell-address="'TO-DO'.C5"/>
      <style:map style:condition="cell-content()=&quot;Media&quot;" style:apply-style-name="PR_5f_Media" style:base-cell-address="'TO-DO'.C5"/>
      <style:map style:condition="cell-content()=&quot;Baja&quot;" style:apply-style-name="PR_5f_Baja" style:base-cell-address="'TO-DO'.C5"/>
      <style:map style:condition="is-true-formula(['TO-DO'.$D5]=&quot;En Proceso&quot;)" style:apply-style-name="Estado_5f_En_5f_Proceso" style:base-cell-address="'TO-DO'.C5"/>
    </style:style>
    <style:style style:name="ce76" style:family="table-cell" style:parent-style-name="PR_5f_Baja">
      <style:table-cell-properties style:glyph-orientation-vertical="auto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'TO-DO'.$D6]=&quot;Terminado&quot;)" style:apply-style-name="Estado_5f_Terminado" style:base-cell-address="'TO-DO'.C6"/>
      <style:map style:condition="cell-content()=&quot;Alta&quot;" style:apply-style-name="PR_5f_Alta" style:base-cell-address="'TO-DO'.C6"/>
      <style:map style:condition="cell-content()=&quot;Media&quot;" style:apply-style-name="PR_5f_Media" style:base-cell-address="'TO-DO'.C6"/>
      <style:map style:condition="cell-content()=&quot;Baja&quot;" style:apply-style-name="PR_5f_Baja" style:base-cell-address="'TO-DO'.C6"/>
      <style:map style:condition="is-true-formula(['TO-DO'.$D6]=&quot;En Proceso&quot;)" style:apply-style-name="Estado_5f_En_5f_Proceso" style:base-cell-address="'TO-DO'.C6"/>
    </style:style>
    <style:style style:name="ce77" style:family="table-cell" style:parent-style-name="PR_5f_Media">
      <style:table-cell-properties style:glyph-orientation-vertical="auto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'TO-DO'.$D6]=&quot;Terminado&quot;)" style:apply-style-name="Estado_5f_Terminado" style:base-cell-address="'TO-DO'.C6"/>
      <style:map style:condition="cell-content()=&quot;Alta&quot;" style:apply-style-name="PR_5f_Alta" style:base-cell-address="'TO-DO'.C6"/>
      <style:map style:condition="cell-content()=&quot;Media&quot;" style:apply-style-name="PR_5f_Media" style:base-cell-address="'TO-DO'.C6"/>
      <style:map style:condition="cell-content()=&quot;Baja&quot;" style:apply-style-name="PR_5f_Baja" style:base-cell-address="'TO-DO'.C6"/>
      <style:map style:condition="is-true-formula(['TO-DO'.$D6]=&quot;En Proceso&quot;)" style:apply-style-name="Estado_5f_En_5f_Proceso" style:base-cell-address="'TO-DO'.C6"/>
    </style:style>
    <style:style style:name="ce62" style:family="table-cell" style:parent-style-name="PR_5f_Baja">
      <style:table-cell-properties style:glyph-orientation-vertical="auto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'TO-DO'.$D5]=&quot;Terminado&quot;)" style:apply-style-name="Estado_5f_Terminado" style:base-cell-address="'TO-DO'.C5"/>
      <style:map style:condition="cell-content()=&quot;Alta&quot;" style:apply-style-name="PR_5f_Alta" style:base-cell-address="'TO-DO'.C5"/>
      <style:map style:condition="cell-content()=&quot;Media&quot;" style:apply-style-name="PR_5f_Media" style:base-cell-address="'TO-DO'.C5"/>
      <style:map style:condition="cell-content()=&quot;Baja&quot;" style:apply-style-name="PR_5f_Baja" style:base-cell-address="'TO-DO'.C5"/>
      <style:map style:condition="is-true-formula(['TO-DO'.$D5]=&quot;En Proceso&quot;)" style:apply-style-name="Estado_5f_En_5f_Proceso" style:base-cell-address="'TO-DO'.C5"/>
    </style:style>
    <style:style style:name="ce63" style:family="table-cell" style:parent-style-name="PR_5f_Media">
      <style:table-cell-properties style:glyph-orientation-vertical="auto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'TO-DO'.$D5]=&quot;Terminado&quot;)" style:apply-style-name="Estado_5f_Terminado" style:base-cell-address="'TO-DO'.C5"/>
      <style:map style:condition="cell-content()=&quot;Alta&quot;" style:apply-style-name="PR_5f_Alta" style:base-cell-address="'TO-DO'.C5"/>
      <style:map style:condition="cell-content()=&quot;Media&quot;" style:apply-style-name="PR_5f_Media" style:base-cell-address="'TO-DO'.C5"/>
      <style:map style:condition="cell-content()=&quot;Baja&quot;" style:apply-style-name="PR_5f_Baja" style:base-cell-address="'TO-DO'.C5"/>
      <style:map style:condition="is-true-formula(['TO-DO'.$D5]=&quot;En Proceso&quot;)" style:apply-style-name="Estado_5f_En_5f_Proceso" style:base-cell-address="'TO-DO'.C5"/>
    </style:style>
    <style:style style:name="ce64" style:family="table-cell" style:parent-style-name="PR_5f_Baja">
      <style:table-cell-properties style:glyph-orientation-vertical="auto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  <style:map style:condition="is-true-formula(['TO-DO'.$D5]=&quot;Terminado&quot;)" style:apply-style-name="Estado_5f_Terminado" style:base-cell-address="'TO-DO'.C5"/>
      <style:map style:condition="cell-content()=&quot;Alta&quot;" style:apply-style-name="PR_5f_Alta" style:base-cell-address="'TO-DO'.C5"/>
      <style:map style:condition="cell-content()=&quot;Media&quot;" style:apply-style-name="PR_5f_Media" style:base-cell-address="'TO-DO'.C5"/>
      <style:map style:condition="cell-content()=&quot;Baja&quot;" style:apply-style-name="PR_5f_Baja" style:base-cell-address="'TO-DO'.C5"/>
      <style:map style:condition="is-true-formula(['TO-DO'.$D5]=&quot;En Proceso&quot;)" style:apply-style-name="Estado_5f_En_5f_Proceso" style:base-cell-address="'TO-DO'.C5"/>
    </style:style>
    <style:style style:name="ce65" style:family="table-cell" style:parent-style-name="PR_5f_Baja">
      <style:table-cell-properties style:glyph-orientation-vertical="auto" fo:background-color="#ffffcc" style:diagonal-bl-tr="none" style:diagonal-tl-br="none" style:text-align-source="value-type" style:repeat-content="false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  <style:map style:condition="is-true-formula(['TO-DO'.$D5]=&quot;Terminado&quot;)" style:apply-style-name="Estado_5f_Terminado" style:base-cell-address="'TO-DO'.C5"/>
      <style:map style:condition="cell-content()=&quot;Alta&quot;" style:apply-style-name="PR_5f_Alta" style:base-cell-address="'TO-DO'.C5"/>
      <style:map style:condition="cell-content()=&quot;Media&quot;" style:apply-style-name="PR_5f_Media" style:base-cell-address="'TO-DO'.C5"/>
      <style:map style:condition="cell-content()=&quot;Baja&quot;" style:apply-style-name="PR_5f_Baja" style:base-cell-address="'TO-DO'.C5"/>
      <style:map style:condition="is-true-formula(['TO-DO'.$D5]=&quot;En Proceso&quot;)" style:apply-style-name="Estado_5f_En_5f_Proceso" style:base-cell-address="'TO-DO'.C5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Sin Iniciar&quot;" style:apply-style-name="Gnumeric-1" style:base-cell-address="'TO-DO'.D5"/>
      <style:map style:condition="cell-content()=&quot;Pendiente&quot;" style:apply-style-name="Gnumeric-1" style:base-cell-address="'TO-DO'.D5"/>
      <style:map style:condition="cell-content()=&quot;Activo&quot;" style:apply-style-name="Gnumeric-3" style:base-cell-address="'TO-DO'.D5"/>
      <style:map style:condition="cell-content()=&quot;En Proceso&quot;" style:apply-style-name="Estado_5f_En_5f_Proceso" style:base-cell-address="'TO-DO'.D5"/>
      <style:map style:condition="cell-content()=&quot;Terminado&quot;" style:apply-style-name="Estado_5f_Terminado" style:base-cell-address="'TO-DO'.D5"/>
    </style:style>
    <style:style style:name="ce81" style:family="table-cell" style:parent-style-name="Estado_5f_Terminado">
      <style:table-cell-properties style:glyph-orientation-vertical="auto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Sin Iniciar&quot;" style:apply-style-name="Gnumeric-1" style:base-cell-address="'TO-DO'.D5"/>
      <style:map style:condition="cell-content()=&quot;Pendiente&quot;" style:apply-style-name="Gnumeric-1" style:base-cell-address="'TO-DO'.D5"/>
      <style:map style:condition="cell-content()=&quot;Activo&quot;" style:apply-style-name="Gnumeric-3" style:base-cell-address="'TO-DO'.D5"/>
      <style:map style:condition="cell-content()=&quot;En Proceso&quot;" style:apply-style-name="Estado_5f_En_5f_Proceso" style:base-cell-address="'TO-DO'.D5"/>
      <style:map style:condition="cell-content()=&quot;Terminado&quot;" style:apply-style-name="Estado_5f_Terminado" style:base-cell-address="'TO-DO'.D5"/>
    </style:style>
    <style:style style:name="ce33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cc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  <style:map style:condition="cell-content()=&quot;Sin Iniciar&quot;" style:apply-style-name="Gnumeric-1" style:base-cell-address="'TO-DO'.D5"/>
      <style:map style:condition="cell-content()=&quot;Pendiente&quot;" style:apply-style-name="Gnumeric-1" style:base-cell-address="'TO-DO'.D5"/>
      <style:map style:condition="cell-content()=&quot;Activo&quot;" style:apply-style-name="Gnumeric-3" style:base-cell-address="'TO-DO'.D5"/>
      <style:map style:condition="cell-content()=&quot;En Proceso&quot;" style:apply-style-name="Estado_5f_En_5f_Proceso" style:base-cell-address="'TO-DO'.D5"/>
      <style:map style:condition="cell-content()=&quot;Terminado&quot;" style:apply-style-name="Estado_5f_Terminado" style:base-cell-address="'TO-DO'.D5"/>
    </style:style>
    <style:style style:name="ce9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'TO-DO'.$D5]=&quot;Terminado&quot;)" style:apply-style-name="Estado_5f_Terminado" style:base-cell-address="'TO-DO'.E5"/>
      <style:map style:condition="is-true-formula(['TO-DO'.$D5]=&quot;En Proceso&quot;)" style:apply-style-name="Estado_5f_En_5f_Proceso" style:base-cell-address="'TO-DO'.E5"/>
    </style:style>
    <style:style style:name="ce96" style:family="table-cell" style:parent-style-name="PR_5f_Baja" style:data-style-name="N37">
      <style:table-cell-properties style:glyph-orientation-vertical="auto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'TO-DO'.$D5]=&quot;Terminado&quot;)" style:apply-style-name="Estado_5f_Terminado" style:base-cell-address="'TO-DO'.E5"/>
      <style:map style:condition="is-true-formula(['TO-DO'.$D5]=&quot;En Proceso&quot;)" style:apply-style-name="Estado_5f_En_5f_Proceso" style:base-cell-address="'TO-DO'.E5"/>
    </style:style>
    <style:style style:name="ce97" style:family="table-cell" style:parent-style-name="PR_5f_Media" style:data-style-name="N37">
      <style:table-cell-properties style:glyph-orientation-vertical="auto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'TO-DO'.$D5]=&quot;Terminado&quot;)" style:apply-style-name="Estado_5f_Terminado" style:base-cell-address="'TO-DO'.E5"/>
      <style:map style:condition="is-true-formula(['TO-DO'.$D5]=&quot;En Proceso&quot;)" style:apply-style-name="Estado_5f_En_5f_Proceso" style:base-cell-address="'TO-DO'.E5"/>
    </style:style>
    <style:style style:name="ce98" style:family="table-cell" style:parent-style-name="PR_5f_Baja" style:data-style-name="N37">
      <style:table-cell-properties style:glyph-orientation-vertical="auto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  <style:map style:condition="is-true-formula(['TO-DO'.$D5]=&quot;Terminado&quot;)" style:apply-style-name="Estado_5f_Terminado" style:base-cell-address="'TO-DO'.E5"/>
      <style:map style:condition="is-true-formula(['TO-DO'.$D5]=&quot;En Proceso&quot;)" style:apply-style-name="Estado_5f_En_5f_Proceso" style:base-cell-address="'TO-DO'.E5"/>
    </style:style>
    <style:style style:name="ce99" style:family="table-cell" style:parent-style-name="PR_5f_Baja" style:data-style-name="N37">
      <style:table-cell-properties style:glyph-orientation-vertical="auto" fo:background-color="#ffffcc" style:diagonal-bl-tr="none" style:diagonal-tl-br="none" style:text-align-source="value-type" style:repeat-content="false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  <style:map style:condition="is-true-formula(['TO-DO'.$D5]=&quot;Terminado&quot;)" style:apply-style-name="Estado_5f_Terminado" style:base-cell-address="'TO-DO'.E5"/>
      <style:map style:condition="is-true-formula(['TO-DO'.$D5]=&quot;En Proceso&quot;)" style:apply-style-name="Estado_5f_En_5f_Proceso" style:base-cell-address="'TO-DO'.E5"/>
    </style:style>
    <style:style style:name="ce82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'TO-DO'.$D5]=&quot;Terminado&quot;)" style:apply-style-name="Estado_5f_Terminado" style:base-cell-address="'TO-DO'.F5"/>
      <style:map style:condition="is-true-formula(['TO-DO'.$D5]=&quot;En Proceso&quot;)" style:apply-style-name="Estado_5f_En_5f_Proceso" style:base-cell-address="'TO-DO'.F5"/>
    </style:style>
    <style:style style:name="ce102" style:family="table-cell" style:parent-style-name="PR_5f_Baja">
      <style:table-cell-properties style:glyph-orientation-vertical="auto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'TO-DO'.$D5]=&quot;Terminado&quot;)" style:apply-style-name="Estado_5f_Terminado" style:base-cell-address="'TO-DO'.F5"/>
      <style:map style:condition="is-true-formula(['TO-DO'.$D5]=&quot;En Proceso&quot;)" style:apply-style-name="Estado_5f_En_5f_Proceso" style:base-cell-address="'TO-DO'.F5"/>
    </style:style>
    <style:style style:name="ce132" style:family="table-cell" style:parent-style-name="PR_5f_Baja">
      <style:table-cell-properties style:glyph-orientation-vertical="auto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'TO-DO'.$D7]=&quot;Terminado&quot;)" style:apply-style-name="Estado_5f_Terminado" style:base-cell-address="'TO-DO'.F7"/>
      <style:map style:condition="is-true-formula(['TO-DO'.$D7]=&quot;En Proceso&quot;)" style:apply-style-name="Estado_5f_En_5f_Proceso" style:base-cell-address="'TO-DO'.F7"/>
    </style:style>
    <style:style style:name="ce103" style:family="table-cell" style:parent-style-name="PR_5f_Media">
      <style:table-cell-properties style:glyph-orientation-vertical="auto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'TO-DO'.$D5]=&quot;Terminado&quot;)" style:apply-style-name="Estado_5f_Terminado" style:base-cell-address="'TO-DO'.F5"/>
      <style:map style:condition="is-true-formula(['TO-DO'.$D5]=&quot;En Proceso&quot;)" style:apply-style-name="Estado_5f_En_5f_Proceso" style:base-cell-address="'TO-DO'.F5"/>
    </style:style>
    <style:style style:name="ce104" style:family="table-cell" style:parent-style-name="PR_5f_Baja">
      <style:table-cell-properties style:glyph-orientation-vertical="auto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  <style:map style:condition="is-true-formula(['TO-DO'.$D5]=&quot;Terminado&quot;)" style:apply-style-name="Estado_5f_Terminado" style:base-cell-address="'TO-DO'.F5"/>
      <style:map style:condition="is-true-formula(['TO-DO'.$D5]=&quot;En Proceso&quot;)" style:apply-style-name="Estado_5f_En_5f_Proceso" style:base-cell-address="'TO-DO'.F5"/>
    </style:style>
    <style:style style:name="ce105" style:family="table-cell" style:parent-style-name="PR_5f_Baja">
      <style:table-cell-properties style:glyph-orientation-vertical="auto" fo:background-color="#ffffcc" style:diagonal-bl-tr="none" style:diagonal-tl-br="none" style:text-align-source="value-type" style:repeat-content="false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  <style:map style:condition="is-true-formula(['TO-DO'.$D5]=&quot;Terminado&quot;)" style:apply-style-name="Estado_5f_Terminado" style:base-cell-address="'TO-DO'.F5"/>
      <style:map style:condition="is-true-formula(['TO-DO'.$D5]=&quot;En Proceso&quot;)" style:apply-style-name="Estado_5f_En_5f_Proceso" style:base-cell-address="'TO-DO'.F5"/>
    </style:style>
    <style:style style:name="ce10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'TO-DO'.$D5]=&quot;Terminado&quot;)" style:apply-style-name="Estado_5f_Terminado" style:base-cell-address="'TO-DO'.G5"/>
      <style:map style:condition="is-true-formula(['TO-DO'.$D5]=&quot;En Proceso&quot;)" style:apply-style-name="Estado_5f_En_5f_Proceso" style:base-cell-address="'TO-DO'.G5"/>
    </style:style>
    <style:style style:name="ce107" style:family="table-cell" style:parent-style-name="PR_5f_Baja">
      <style:table-cell-properties style:glyph-orientation-vertical="auto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'TO-DO'.$D5]=&quot;Terminado&quot;)" style:apply-style-name="Estado_5f_Terminado" style:base-cell-address="'TO-DO'.G5"/>
      <style:map style:condition="is-true-formula(['TO-DO'.$D5]=&quot;En Proceso&quot;)" style:apply-style-name="Estado_5f_En_5f_Proceso" style:base-cell-address="'TO-DO'.G5"/>
    </style:style>
    <style:style style:name="ce108" style:family="table-cell" style:parent-style-name="PR_5f_Media">
      <style:table-cell-properties style:glyph-orientation-vertical="auto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'TO-DO'.$D5]=&quot;Terminado&quot;)" style:apply-style-name="Estado_5f_Terminado" style:base-cell-address="'TO-DO'.G5"/>
      <style:map style:condition="is-true-formula(['TO-DO'.$D5]=&quot;En Proceso&quot;)" style:apply-style-name="Estado_5f_En_5f_Proceso" style:base-cell-address="'TO-DO'.G5"/>
    </style:style>
    <style:style style:name="ce109" style:family="table-cell" style:parent-style-name="PR_5f_Baja">
      <style:table-cell-properties style:glyph-orientation-vertical="auto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  <style:map style:condition="is-true-formula(['TO-DO'.$D5]=&quot;Terminado&quot;)" style:apply-style-name="Estado_5f_Terminado" style:base-cell-address="'TO-DO'.G5"/>
      <style:map style:condition="is-true-formula(['TO-DO'.$D5]=&quot;En Proceso&quot;)" style:apply-style-name="Estado_5f_En_5f_Proceso" style:base-cell-address="'TO-DO'.G5"/>
    </style:style>
    <style:style style:name="ce110" style:family="table-cell" style:parent-style-name="PR_5f_Baja">
      <style:table-cell-properties style:glyph-orientation-vertical="auto" fo:background-color="#ffffcc" style:diagonal-bl-tr="none" style:diagonal-tl-br="none" style:text-align-source="value-type" style:repeat-content="false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  <style:map style:condition="is-true-formula(['TO-DO'.$D5]=&quot;Terminado&quot;)" style:apply-style-name="Estado_5f_Terminado" style:base-cell-address="'TO-DO'.G5"/>
      <style:map style:condition="is-true-formula(['TO-DO'.$D5]=&quot;En Proceso&quot;)" style:apply-style-name="Estado_5f_En_5f_Proceso" style:base-cell-address="'TO-DO'.G5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Bugs.$D5]=&quot;Terminado&quot;)" style:apply-style-name="Estado_5f_Terminado_5f_Tachado" style:base-cell-address="Bugs.A5"/>
      <style:map style:condition="is-true-formula([Bugs.$D5]=&quot;En Proceso&quot;)" style:apply-style-name="Estado_5f_En_5f_Proceso" style:base-cell-address="Bugs.A5"/>
    </style:style>
    <style:style style:name="ce112" style:family="table-cell" style:parent-style-name="Default" style:data-style-name="N10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Bugs.$D5]=&quot;Terminado&quot;)" style:apply-style-name="Estado_5f_Terminado_5f_Tachado" style:base-cell-address="Bugs.A5"/>
      <style:map style:condition="is-true-formula([Bugs.$D5]=&quot;En Proceso&quot;)" style:apply-style-name="Estado_5f_En_5f_Proceso" style:base-cell-address="Bugs.A5"/>
    </style:style>
    <style:style style:name="ce11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margin-left="3.53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Bugs.$D5]=&quot;Terminado&quot;)" style:apply-style-name="Estado_5f_Terminado_5f_Tachado" style:base-cell-address="Bugs.A5"/>
      <style:map style:condition="is-true-formula([Bugs.$D5]=&quot;En Proceso&quot;)" style:apply-style-name="Estado_5f_En_5f_Proceso" style:base-cell-address="Bugs.A5"/>
    </style:style>
    <style:style style:name="ce1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Bugs.$D5]=&quot;Terminado&quot;)" style:apply-style-name="Estado_5f_Terminado_5f_Tachado" style:base-cell-address="Bugs.A5"/>
      <style:map style:condition="is-true-formula([Bugs.$D5]=&quot;En Proceso&quot;)" style:apply-style-name="Estado_5f_En_5f_Proceso" style:base-cell-address="Bugs.A5"/>
    </style:style>
    <style:style style:name="ce1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3.53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Bugs.$D5]=&quot;Terminado&quot;)" style:apply-style-name="Estado_5f_Terminado_5f_Tachado" style:base-cell-address="Bugs.A5"/>
      <style:map style:condition="is-true-formula([Bugs.$D5]=&quot;En Proceso&quot;)" style:apply-style-name="Estado_5f_En_5f_Proceso" style:base-cell-address="Bugs.A5"/>
    </style:style>
    <style:style style:name="ce1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7.06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Bugs.$D5]=&quot;Terminado&quot;)" style:apply-style-name="Estado_5f_Terminado_5f_Tachado" style:base-cell-address="Bugs.A5"/>
      <style:map style:condition="is-true-formula([Bugs.$D5]=&quot;En Proceso&quot;)" style:apply-style-name="Estado_5f_En_5f_Proceso" style:base-cell-address="Bugs.A5"/>
    </style:style>
    <style:style style:name="ce117" style:family="table-cell" style:parent-style-name="Estado_5f_Terminado">
      <style:table-cell-properties style:glyph-orientation-vertical="auto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Bugs.$D23]=&quot;Terminado&quot;)" style:apply-style-name="Estado_5f_Terminado_5f_Tachado" style:base-cell-address="Bugs.A23"/>
      <style:map style:condition="is-true-formula([Bugs.$D23]=&quot;En Proceso&quot;)" style:apply-style-name="Estado_5f_En_5f_Proceso" style:base-cell-address="Bugs.A23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  <style:map style:condition="is-true-formula([Bugs.$D5]=&quot;Terminado&quot;)" style:apply-style-name="Estado_5f_Terminado_5f_Tachado" style:base-cell-address="Bugs.A5"/>
      <style:map style:condition="is-true-formula([Bugs.$D5]=&quot;En Proceso&quot;)" style:apply-style-name="Estado_5f_En_5f_Proceso" style:base-cell-address="Bugs.A5"/>
    </style:style>
    <style:style style:name="ce119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wrap" fo:border="0.06pt solid #000000" style:rotation-angle="0" style:rotation-align="none" style:shrink-to-fit="false" gnm:background-colour="#ffffcc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  <style:map style:condition="is-true-formula([Bugs.$D5]=&quot;Terminado&quot;)" style:apply-style-name="Estado_5f_Terminado_5f_Tachado" style:base-cell-address="Bugs.A5"/>
      <style:map style:condition="is-true-formula([Bugs.$D5]=&quot;En Proceso&quot;)" style:apply-style-name="Estado_5f_En_5f_Proceso" style:base-cell-address="Bugs.A5"/>
    </style:style>
    <style:style style:name="ce1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Bugs.$D5]=&quot;Terminado&quot;)" style:apply-style-name="Estado_5f_Terminado_5f_Tachado" style:base-cell-address="Bugs.B5"/>
      <style:map style:condition="is-true-formula([Bugs.$D5]=&quot;En Proceso&quot;)" style:apply-style-name="Estado_5f_En_5f_Proceso" style:base-cell-address="Bugs.B5"/>
    </style:style>
    <style:style style:name="ce121" style:family="table-cell" style:parent-style-name="Default" style:data-style-name="N10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Bugs.$D5]=&quot;Terminado&quot;)" style:apply-style-name="Estado_5f_Terminado_5f_Tachado" style:base-cell-address="Bugs.B5"/>
      <style:map style:condition="is-true-formula([Bugs.$D5]=&quot;En Proceso&quot;)" style:apply-style-name="Estado_5f_En_5f_Proceso" style:base-cell-address="Bugs.B5"/>
    </style:style>
    <style:style style:name="ce12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margin-left="3.53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Bugs.$D5]=&quot;Terminado&quot;)" style:apply-style-name="Estado_5f_Terminado_5f_Tachado" style:base-cell-address="Bugs.B5"/>
      <style:map style:condition="is-true-formula([Bugs.$D5]=&quot;En Proceso&quot;)" style:apply-style-name="Estado_5f_En_5f_Proceso" style:base-cell-address="Bugs.B5"/>
    </style:style>
    <style:style style:name="ce1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Bugs.$D5]=&quot;Terminado&quot;)" style:apply-style-name="Estado_5f_Terminado_5f_Tachado" style:base-cell-address="Bugs.B5"/>
      <style:map style:condition="is-true-formula([Bugs.$D5]=&quot;En Proceso&quot;)" style:apply-style-name="Estado_5f_En_5f_Proceso" style:base-cell-address="Bugs.B5"/>
    </style:style>
    <style:style style:name="ce1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3.53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Bugs.$D5]=&quot;Terminado&quot;)" style:apply-style-name="Estado_5f_Terminado_5f_Tachado" style:base-cell-address="Bugs.B5"/>
      <style:map style:condition="is-true-formula([Bugs.$D5]=&quot;En Proceso&quot;)" style:apply-style-name="Estado_5f_En_5f_Proceso" style:base-cell-address="Bugs.B5"/>
    </style:style>
    <style:style style:name="ce1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7.06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Bugs.$D5]=&quot;Terminado&quot;)" style:apply-style-name="Estado_5f_Terminado_5f_Tachado" style:base-cell-address="Bugs.B5"/>
      <style:map style:condition="is-true-formula([Bugs.$D5]=&quot;En Proceso&quot;)" style:apply-style-name="Estado_5f_En_5f_Proceso" style:base-cell-address="Bugs.B5"/>
    </style:style>
    <style:style style:name="ce126" style:family="table-cell" style:parent-style-name="Estado_5f_Terminado">
      <style:table-cell-properties style:glyph-orientation-vertical="auto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Bugs.$D23]=&quot;Terminado&quot;)" style:apply-style-name="Estado_5f_Terminado_5f_Tachado" style:base-cell-address="Bugs.B23"/>
      <style:map style:condition="is-true-formula([Bugs.$D23]=&quot;En Proceso&quot;)" style:apply-style-name="Estado_5f_En_5f_Proceso" style:base-cell-address="Bugs.B23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  <style:map style:condition="is-true-formula([Bugs.$D5]=&quot;Terminado&quot;)" style:apply-style-name="Estado_5f_Terminado_5f_Tachado" style:base-cell-address="Bugs.B5"/>
      <style:map style:condition="is-true-formula([Bugs.$D5]=&quot;En Proceso&quot;)" style:apply-style-name="Estado_5f_En_5f_Proceso" style:base-cell-address="Bugs.B5"/>
    </style:style>
    <style:style style:name="ce1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Bugs.$D5]=&quot;Terminado&quot;)" style:apply-style-name="Estado_5f_Terminado_5f_Tachado" style:base-cell-address="Bugs.B5"/>
      <style:map style:condition="is-true-formula([Bugs.$D5]=&quot;En Proceso&quot;)" style:apply-style-name="Estado_5f_En_5f_Proceso" style:base-cell-address="Bugs.B5"/>
    </style:style>
    <style:style style:name="ce129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wrap" fo:border="0.06pt solid #000000" style:rotation-angle="0" style:rotation-align="none" style:shrink-to-fit="false" gnm:background-colour="#ffffcc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  <style:map style:condition="is-true-formula([Bugs.$D5]=&quot;Terminado&quot;)" style:apply-style-name="Estado_5f_Terminado_5f_Tachado" style:base-cell-address="Bugs.B5"/>
      <style:map style:condition="is-true-formula([Bugs.$D5]=&quot;En Proceso&quot;)" style:apply-style-name="Estado_5f_En_5f_Proceso" style:base-cell-address="Bugs.B5"/>
    </style:style>
    <style:style style:name="ce1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Bugs.$D5]=&quot;Terminado&quot;)" style:apply-style-name="Estado_5f_Terminado" style:base-cell-address="Bugs.C5"/>
      <style:map style:condition="cell-content()=&quot;Alta&quot;" style:apply-style-name="PR_5f_Alta" style:base-cell-address="Bugs.C5"/>
      <style:map style:condition="cell-content()=&quot;Media&quot;" style:apply-style-name="PR_5f_Media" style:base-cell-address="Bugs.C5"/>
      <style:map style:condition="cell-content()=&quot;Baja&quot;" style:apply-style-name="PR_5f_Baja" style:base-cell-address="Bugs.C5"/>
      <style:map style:condition="is-true-formula([Bugs.$D5]=&quot;En Proceso&quot;)" style:apply-style-name="Estado_5f_En_5f_Proceso" style:base-cell-address="Bugs.C5"/>
    </style:style>
    <style:style style:name="ce166" style:family="table-cell" style:parent-style-name="PR_5f_Baja">
      <style:table-cell-properties style:glyph-orientation-vertical="auto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Bugs.$D5]=&quot;Terminado&quot;)" style:apply-style-name="Estado_5f_Terminado" style:base-cell-address="Bugs.C5"/>
      <style:map style:condition="cell-content()=&quot;Alta&quot;" style:apply-style-name="PR_5f_Alta" style:base-cell-address="Bugs.C5"/>
      <style:map style:condition="cell-content()=&quot;Media&quot;" style:apply-style-name="PR_5f_Media" style:base-cell-address="Bugs.C5"/>
      <style:map style:condition="cell-content()=&quot;Baja&quot;" style:apply-style-name="PR_5f_Baja" style:base-cell-address="Bugs.C5"/>
      <style:map style:condition="is-true-formula([Bugs.$D5]=&quot;En Proceso&quot;)" style:apply-style-name="Estado_5f_En_5f_Proceso" style:base-cell-address="Bugs.C5"/>
    </style:style>
    <style:style style:name="ce167" style:family="table-cell" style:parent-style-name="PR_5f_Media">
      <style:table-cell-properties style:glyph-orientation-vertical="auto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Bugs.$D5]=&quot;Terminado&quot;)" style:apply-style-name="Estado_5f_Terminado" style:base-cell-address="Bugs.C5"/>
      <style:map style:condition="cell-content()=&quot;Alta&quot;" style:apply-style-name="PR_5f_Alta" style:base-cell-address="Bugs.C5"/>
      <style:map style:condition="cell-content()=&quot;Media&quot;" style:apply-style-name="PR_5f_Media" style:base-cell-address="Bugs.C5"/>
      <style:map style:condition="cell-content()=&quot;Baja&quot;" style:apply-style-name="PR_5f_Baja" style:base-cell-address="Bugs.C5"/>
      <style:map style:condition="is-true-formula([Bugs.$D5]=&quot;En Proceso&quot;)" style:apply-style-name="Estado_5f_En_5f_Proceso" style:base-cell-address="Bugs.C5"/>
    </style:style>
    <style:style style:name="ce168" style:family="table-cell" style:parent-style-name="PR_5f_Baja">
      <style:table-cell-properties style:glyph-orientation-vertical="auto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  <style:map style:condition="is-true-formula([Bugs.$D5]=&quot;Terminado&quot;)" style:apply-style-name="Estado_5f_Terminado" style:base-cell-address="Bugs.C5"/>
      <style:map style:condition="cell-content()=&quot;Alta&quot;" style:apply-style-name="PR_5f_Alta" style:base-cell-address="Bugs.C5"/>
      <style:map style:condition="cell-content()=&quot;Media&quot;" style:apply-style-name="PR_5f_Media" style:base-cell-address="Bugs.C5"/>
      <style:map style:condition="cell-content()=&quot;Baja&quot;" style:apply-style-name="PR_5f_Baja" style:base-cell-address="Bugs.C5"/>
      <style:map style:condition="is-true-formula([Bugs.$D5]=&quot;En Proceso&quot;)" style:apply-style-name="Estado_5f_En_5f_Proceso" style:base-cell-address="Bugs.C5"/>
    </style:style>
    <style:style style:name="ce169" style:family="table-cell" style:parent-style-name="PR_5f_Baja">
      <style:table-cell-properties style:glyph-orientation-vertical="auto" fo:background-color="#ffffcc" style:diagonal-bl-tr="none" style:diagonal-tl-br="none" style:text-align-source="value-type" style:repeat-content="false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  <style:map style:condition="is-true-formula([Bugs.$D5]=&quot;Terminado&quot;)" style:apply-style-name="Estado_5f_Terminado" style:base-cell-address="Bugs.C5"/>
      <style:map style:condition="cell-content()=&quot;Alta&quot;" style:apply-style-name="PR_5f_Alta" style:base-cell-address="Bugs.C5"/>
      <style:map style:condition="cell-content()=&quot;Media&quot;" style:apply-style-name="PR_5f_Media" style:base-cell-address="Bugs.C5"/>
      <style:map style:condition="cell-content()=&quot;Baja&quot;" style:apply-style-name="PR_5f_Baja" style:base-cell-address="Bugs.C5"/>
      <style:map style:condition="is-true-formula([Bugs.$D5]=&quot;En Proceso&quot;)" style:apply-style-name="Estado_5f_En_5f_Proceso" style:base-cell-address="Bugs.C5"/>
    </style:style>
    <style:style style:name="ce1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Sin Iniciar&quot;" style:apply-style-name="Gnumeric-1" style:base-cell-address="Bugs.D5"/>
      <style:map style:condition="cell-content()=&quot;Pendiente&quot;" style:apply-style-name="Gnumeric-1" style:base-cell-address="Bugs.D5"/>
      <style:map style:condition="cell-content()=&quot;Activo&quot;" style:apply-style-name="Gnumeric-3" style:base-cell-address="Bugs.D5"/>
      <style:map style:condition="cell-content()=&quot;En Proceso&quot;" style:apply-style-name="Estado_5f_En_5f_Proceso" style:base-cell-address="Bugs.D5"/>
      <style:map style:condition="cell-content()=&quot;Terminado&quot;" style:apply-style-name="Estado_5f_Terminado" style:base-cell-address="Bugs.D5"/>
    </style:style>
    <style:style style:name="ce171" style:family="table-cell" style:parent-style-name="Estado_5f_Terminado">
      <style:table-cell-properties style:glyph-orientation-vertical="auto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Sin Iniciar&quot;" style:apply-style-name="Gnumeric-1" style:base-cell-address="Bugs.D5"/>
      <style:map style:condition="cell-content()=&quot;Pendiente&quot;" style:apply-style-name="Gnumeric-1" style:base-cell-address="Bugs.D5"/>
      <style:map style:condition="cell-content()=&quot;Activo&quot;" style:apply-style-name="Gnumeric-3" style:base-cell-address="Bugs.D5"/>
      <style:map style:condition="cell-content()=&quot;En Proceso&quot;" style:apply-style-name="Estado_5f_En_5f_Proceso" style:base-cell-address="Bugs.D5"/>
      <style:map style:condition="cell-content()=&quot;Terminado&quot;" style:apply-style-name="Estado_5f_Terminado" style:base-cell-address="Bugs.D5"/>
    </style:style>
    <style:style style:name="ce138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cc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  <style:map style:condition="cell-content()=&quot;Sin Iniciar&quot;" style:apply-style-name="Gnumeric-1" style:base-cell-address="Bugs.D5"/>
      <style:map style:condition="cell-content()=&quot;Pendiente&quot;" style:apply-style-name="Gnumeric-1" style:base-cell-address="Bugs.D5"/>
      <style:map style:condition="cell-content()=&quot;Activo&quot;" style:apply-style-name="Gnumeric-3" style:base-cell-address="Bugs.D5"/>
      <style:map style:condition="cell-content()=&quot;En Proceso&quot;" style:apply-style-name="Estado_5f_En_5f_Proceso" style:base-cell-address="Bugs.D5"/>
      <style:map style:condition="cell-content()=&quot;Terminado&quot;" style:apply-style-name="Estado_5f_Terminado" style:base-cell-address="Bugs.D5"/>
    </style:style>
    <style:style style:name="ce1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Bugs.$D5]=&quot;Terminado&quot;)" style:apply-style-name="Estado_5f_Terminado" style:base-cell-address="Bugs.E5"/>
      <style:map style:condition="is-true-formula([Bugs.$D5]=&quot;En Proceso&quot;)" style:apply-style-name="Estado_5f_En_5f_Proceso" style:base-cell-address="Bugs.E5"/>
    </style:style>
    <style:style style:name="ce174" style:family="table-cell" style:parent-style-name="PR_5f_Baja" style:data-style-name="N37">
      <style:table-cell-properties style:glyph-orientation-vertical="auto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Bugs.$D5]=&quot;Terminado&quot;)" style:apply-style-name="Estado_5f_Terminado" style:base-cell-address="Bugs.E5"/>
      <style:map style:condition="is-true-formula([Bugs.$D5]=&quot;En Proceso&quot;)" style:apply-style-name="Estado_5f_En_5f_Proceso" style:base-cell-address="Bugs.E5"/>
    </style:style>
    <style:style style:name="ce175" style:family="table-cell" style:parent-style-name="PR_5f_Media" style:data-style-name="N37">
      <style:table-cell-properties style:glyph-orientation-vertical="auto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Bugs.$D5]=&quot;Terminado&quot;)" style:apply-style-name="Estado_5f_Terminado" style:base-cell-address="Bugs.E5"/>
      <style:map style:condition="is-true-formula([Bugs.$D5]=&quot;En Proceso&quot;)" style:apply-style-name="Estado_5f_En_5f_Proceso" style:base-cell-address="Bugs.E5"/>
    </style:style>
    <style:style style:name="ce176" style:family="table-cell" style:parent-style-name="PR_5f_Baja" style:data-style-name="N37">
      <style:table-cell-properties style:glyph-orientation-vertical="auto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  <style:map style:condition="is-true-formula([Bugs.$D5]=&quot;Terminado&quot;)" style:apply-style-name="Estado_5f_Terminado" style:base-cell-address="Bugs.E5"/>
      <style:map style:condition="is-true-formula([Bugs.$D5]=&quot;En Proceso&quot;)" style:apply-style-name="Estado_5f_En_5f_Proceso" style:base-cell-address="Bugs.E5"/>
    </style:style>
    <style:style style:name="ce177" style:family="table-cell" style:parent-style-name="PR_5f_Baja" style:data-style-name="N37">
      <style:table-cell-properties style:glyph-orientation-vertical="auto" fo:background-color="#ffffcc" style:diagonal-bl-tr="none" style:diagonal-tl-br="none" style:text-align-source="value-type" style:repeat-content="false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  <style:map style:condition="is-true-formula([Bugs.$D5]=&quot;Terminado&quot;)" style:apply-style-name="Estado_5f_Terminado" style:base-cell-address="Bugs.E5"/>
      <style:map style:condition="is-true-formula([Bugs.$D5]=&quot;En Proceso&quot;)" style:apply-style-name="Estado_5f_En_5f_Proceso" style:base-cell-address="Bugs.E5"/>
    </style:style>
    <style:style style:name="ce1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Bugs.$D5]=&quot;Terminado&quot;)" style:apply-style-name="Estado_5f_Terminado" style:base-cell-address="Bugs.F5"/>
      <style:map style:condition="is-true-formula([Bugs.$D5]=&quot;En Proceso&quot;)" style:apply-style-name="Estado_5f_En_5f_Proceso" style:base-cell-address="Bugs.F5"/>
    </style:style>
    <style:style style:name="ce179" style:family="table-cell" style:parent-style-name="PR_5f_Baja">
      <style:table-cell-properties style:glyph-orientation-vertical="auto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Bugs.$D5]=&quot;Terminado&quot;)" style:apply-style-name="Estado_5f_Terminado" style:base-cell-address="Bugs.F5"/>
      <style:map style:condition="is-true-formula([Bugs.$D5]=&quot;En Proceso&quot;)" style:apply-style-name="Estado_5f_En_5f_Proceso" style:base-cell-address="Bugs.F5"/>
    </style:style>
    <style:style style:name="ce180" style:family="table-cell" style:parent-style-name="PR_5f_Media">
      <style:table-cell-properties style:glyph-orientation-vertical="auto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Bugs.$D5]=&quot;Terminado&quot;)" style:apply-style-name="Estado_5f_Terminado" style:base-cell-address="Bugs.F5"/>
      <style:map style:condition="is-true-formula([Bugs.$D5]=&quot;En Proceso&quot;)" style:apply-style-name="Estado_5f_En_5f_Proceso" style:base-cell-address="Bugs.F5"/>
    </style:style>
    <style:style style:name="ce181" style:family="table-cell" style:parent-style-name="PR_5f_Baja">
      <style:table-cell-properties style:glyph-orientation-vertical="auto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  <style:map style:condition="is-true-formula([Bugs.$D5]=&quot;Terminado&quot;)" style:apply-style-name="Estado_5f_Terminado" style:base-cell-address="Bugs.F5"/>
      <style:map style:condition="is-true-formula([Bugs.$D5]=&quot;En Proceso&quot;)" style:apply-style-name="Estado_5f_En_5f_Proceso" style:base-cell-address="Bugs.F5"/>
    </style:style>
    <style:style style:name="ce182" style:family="table-cell" style:parent-style-name="PR_5f_Baja">
      <style:table-cell-properties style:glyph-orientation-vertical="auto" fo:background-color="#ffffcc" style:diagonal-bl-tr="none" style:diagonal-tl-br="none" style:text-align-source="value-type" style:repeat-content="false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  <style:map style:condition="is-true-formula([Bugs.$D5]=&quot;Terminado&quot;)" style:apply-style-name="Estado_5f_Terminado" style:base-cell-address="Bugs.F5"/>
      <style:map style:condition="is-true-formula([Bugs.$D5]=&quot;En Proceso&quot;)" style:apply-style-name="Estado_5f_En_5f_Proceso" style:base-cell-address="Bugs.F5"/>
    </style:style>
    <style:style style:name="ce1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Bugs.$D5]=&quot;Terminado&quot;)" style:apply-style-name="Estado_5f_Terminado" style:base-cell-address="Bugs.G5"/>
      <style:map style:condition="is-true-formula([Bugs.$D5]=&quot;En Proceso&quot;)" style:apply-style-name="Estado_5f_En_5f_Proceso" style:base-cell-address="Bugs.G5"/>
    </style:style>
    <style:style style:name="ce184" style:family="table-cell" style:parent-style-name="PR_5f_Baja">
      <style:table-cell-properties style:glyph-orientation-vertical="auto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Bugs.$D5]=&quot;Terminado&quot;)" style:apply-style-name="Estado_5f_Terminado" style:base-cell-address="Bugs.G5"/>
      <style:map style:condition="is-true-formula([Bugs.$D5]=&quot;En Proceso&quot;)" style:apply-style-name="Estado_5f_En_5f_Proceso" style:base-cell-address="Bugs.G5"/>
    </style:style>
    <style:style style:name="ce185" style:family="table-cell" style:parent-style-name="PR_5f_Media">
      <style:table-cell-properties style:glyph-orientation-vertical="auto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[Bugs.$D5]=&quot;Terminado&quot;)" style:apply-style-name="Estado_5f_Terminado" style:base-cell-address="Bugs.G5"/>
      <style:map style:condition="is-true-formula([Bugs.$D5]=&quot;En Proceso&quot;)" style:apply-style-name="Estado_5f_En_5f_Proceso" style:base-cell-address="Bugs.G5"/>
    </style:style>
    <style:style style:name="ce186" style:family="table-cell" style:parent-style-name="PR_5f_Baja">
      <style:table-cell-properties style:glyph-orientation-vertical="auto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  <style:map style:condition="is-true-formula([Bugs.$D5]=&quot;Terminado&quot;)" style:apply-style-name="Estado_5f_Terminado" style:base-cell-address="Bugs.G5"/>
      <style:map style:condition="is-true-formula([Bugs.$D5]=&quot;En Proceso&quot;)" style:apply-style-name="Estado_5f_En_5f_Proceso" style:base-cell-address="Bugs.G5"/>
    </style:style>
    <style:style style:name="ce187" style:family="table-cell" style:parent-style-name="PR_5f_Baja">
      <style:table-cell-properties style:glyph-orientation-vertical="auto" fo:background-color="#ffffcc" style:diagonal-bl-tr="none" style:diagonal-tl-br="none" style:text-align-source="value-type" style:repeat-content="false" fo:wrap-option="wrap" fo:border="0.06pt solid #000000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  <style:map style:condition="is-true-formula([Bugs.$D5]=&quot;Terminado&quot;)" style:apply-style-name="Estado_5f_Terminado" style:base-cell-address="Bugs.G5"/>
      <style:map style:condition="is-true-formula([Bugs.$D5]=&quot;En Proceso&quot;)" style:apply-style-name="Estado_5f_En_5f_Proceso" style:base-cell-address="Bugs.G5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content-validations>
        <table:content-validation table:name="val1" table:condition="of:cell-content-is-in-list(Prioridad)" table:allow-empty-cell="true" table:display-list="unsorted" table:base-cell-address="'TO-DO'.C32">
          <table:error-message table:message-type="stop" table:display="true"/>
        </table:content-validation>
        <table:content-validation table:name="val2" table:condition="of:cell-content-is-in-list(Estado)" table:allow-empty-cell="true" table:display-list="unsorted" table:base-cell-address="'TO-DO'.D32">
          <table:error-message table:message-type="stop" table:display="true"/>
        </table:content-validation>
        <table:content-validation table:name="val3" table:base-cell-address="'TO-DO'.G32">
          <table:error-message table:message-type="stop" table:display="true"/>
        </table:content-validation>
      </table:content-validations>
      <table:table table:name="cfg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7" table:default-cell-style-name="Default"/>
        <table:table-row table:style-name="ro1" table:number-rows-repeated="4">
          <table:table-cell table:number-columns-repeated="128"/>
        </table:table-row>
        <table:table-row table:style-name="ro2">
          <table:table-cell table:style-name="ce1" office:value-type="string" calcext:value-type="string">
            <text:p>Estado</text:p>
          </table:table-cell>
          <table:table-cell table:style-name="Gnumeric-default" table:number-columns-repeated="127"/>
        </table:table-row>
        <table:table-row table:style-name="ro2">
          <table:table-cell table:style-name="ce2" office:value-type="string" calcext:value-type="string">
            <text:p>Sin Iniciar</text:p>
          </table:table-cell>
          <table:table-cell table:style-name="Gnumeric-default" table:number-columns-repeated="127"/>
        </table:table-row>
        <table:table-row table:style-name="ro2">
          <table:table-cell table:style-name="ce2" office:value-type="string" calcext:value-type="string">
            <text:p>Pendiente</text:p>
          </table:table-cell>
          <table:table-cell table:style-name="Gnumeric-default" table:number-columns-repeated="127"/>
        </table:table-row>
        <table:table-row table:style-name="ro2">
          <table:table-cell table:style-name="ce3" office:value-type="string" calcext:value-type="string">
            <text:p>Activo</text:p>
          </table:table-cell>
          <table:table-cell table:style-name="Gnumeric-default" table:number-columns-repeated="127"/>
        </table:table-row>
        <table:table-row table:style-name="ro2">
          <table:table-cell table:style-name="ce3" office:value-type="string" calcext:value-type="string">
            <text:p>En Proceso</text:p>
          </table:table-cell>
          <table:table-cell table:style-name="Gnumeric-default" table:number-columns-repeated="127"/>
        </table:table-row>
        <table:table-row table:style-name="ro1">
          <table:table-cell table:style-name="ce1147" office:value-type="string" calcext:value-type="string">
            <text:p>Terminado</text:p>
          </table:table-cell>
          <table:table-cell table:style-name="Gnumeric-default" table:number-columns-repeated="127"/>
        </table:table-row>
        <table:table-row table:style-name="ro2">
          <table:table-cell table:style-name="ce5"/>
          <table:table-cell table:style-name="Gnumeric-default" table:number-columns-repeated="127"/>
        </table:table-row>
        <table:table-row table:style-name="ro3" table:number-rows-repeated="2">
          <table:table-cell table:number-columns-repeated="128"/>
        </table:table-row>
        <table:table-row table:style-name="ro1">
          <table:table-cell table:style-name="ce1" office:value-type="string" calcext:value-type="string">
            <text:p>Prioridad</text:p>
          </table:table-cell>
          <table:table-cell table:number-columns-repeated="127"/>
        </table:table-row>
        <table:table-row table:style-name="ro1">
          <table:table-cell table:style-name="ce11" office:value-type="string" calcext:value-type="string">
            <text:p>Alta</text:p>
          </table:table-cell>
          <table:table-cell table:number-columns-repeated="127"/>
        </table:table-row>
        <table:table-row table:style-name="ro1">
          <table:table-cell table:style-name="ce12" office:value-type="string" calcext:value-type="string">
            <text:p>Media</text:p>
          </table:table-cell>
          <table:table-cell table:number-columns-repeated="127"/>
        </table:table-row>
        <table:table-row table:style-name="ro1">
          <table:table-cell table:style-name="ce13" office:value-type="string" calcext:value-type="string">
            <text:p>Baja</text:p>
          </table:table-cell>
          <table:table-cell table:number-columns-repeated="127"/>
        </table:table-row>
        <table:table-row table:style-name="ro1">
          <table:table-cell table:style-name="ce5"/>
          <table:table-cell table:number-columns-repeated="127"/>
        </table:table-row>
        <table:table-row table:style-name="ro3">
          <table:table-cell table:number-columns-repeated="128"/>
        </table:table-row>
        <table:table-row table:style-name="ro1">
          <table:table-cell table:number-columns-repeated="128"/>
        </table:table-row>
        <table:table-row table:style-name="ro3" table:number-rows-repeated="104">
          <table:table-cell table:number-columns-repeated="128"/>
        </table:table-row>
        <table:table-row table:style-name="ro3">
          <table:table-cell table:number-columns-repeated="128"/>
        </table:table-row>
        <table:named-expressions>
          <table:named-expression table:name="Print_Area" table:base-cell-address="$cfg.$A$1" table:expression="#REF!"/>
          <table:named-expression table:name="Sheet_Title" table:base-cell-address="$cfg.$A$1" table:expression="&quot;cfg&quot;"/>
        </table:named-expressions>
      </table:table>
      <table:table table:name="TO-DO" table:style-name="ta2">
        <office:forms form:automatic-focus="false" form:apply-design-mode="false"/>
        <table:table-column table:style-name="co3" table:default-cell-style-name="ce6"/>
        <table:table-column table:style-name="co4" table:default-cell-style-name="ce6"/>
        <table:table-column table:style-name="co1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22" table:default-cell-style-name="ce6"/>
        <table:table-row table:style-name="ro4">
          <table:table-cell table:style-name="ce29" office:value-type="string" calcext:value-type="string">
            <text:p>TO-DO</text:p>
          </table:table-cell>
          <table:table-cell table:style-name="ce29" office:value-type="string" calcext:value-type="string">
            <text:p>Helpers</text:p>
          </table:table-cell>
          <table:table-cell table:style-name="ce29" table:number-columns-repeated="5"/>
          <table:table-cell table:number-columns-repeated="122"/>
        </table:table-row>
        <table:table-row table:style-name="ro1" table:number-rows-repeated="2">
          <table:table-cell table:number-columns-repeated="5"/>
          <table:table-cell table:style-name="ce821"/>
          <table:table-cell table:number-columns-repeated="123"/>
        </table:table-row>
        <table:table-row table:style-name="ro1">
          <table:table-cell table:style-name="ce1151" office:value-type="string" calcext:value-type="string">
            <text:p>ID</text:p>
          </table:table-cell>
          <table:table-cell table:style-name="ce1151" office:value-type="string" calcext:value-type="string">
            <text:p>Descripcion</text:p>
          </table:table-cell>
          <table:table-cell table:style-name="ce1151" office:value-type="string" calcext:value-type="string">
            <text:p>Prioridad</text:p>
          </table:table-cell>
          <table:table-cell table:style-name="ce1151" office:value-type="string" calcext:value-type="string">
            <text:p>Estado</text:p>
          </table:table-cell>
          <table:table-cell table:style-name="ce1151" office:value-type="string" calcext:value-type="string">
            <text:p>Fecha</text:p>
          </table:table-cell>
          <table:table-cell table:style-name="ce1151" office:value-type="string" calcext:value-type="string">
            <text:p>Version</text:p>
          </table:table-cell>
          <table:table-cell table:style-name="ce1151" office:value-type="string" calcext:value-type="string">
            <text:p>Notas</text:p>
          </table:table-cell>
          <table:table-cell table:number-columns-repeated="122"/>
        </table:table-row>
        <table:table-row table:style-name="ro1">
          <table:table-cell table:style-name="ce20"/>
          <table:table-cell table:style-name="ce38"/>
          <table:table-cell table:style-name="ce61" table:content-validation-name="val1"/>
          <table:table-cell table:style-name="ce32" table:content-validation-name="val2"/>
          <table:table-cell table:style-name="ce95" table:content-validation-name="val3"/>
          <table:table-cell table:style-name="ce101" table:content-validation-name="val3"/>
          <table:table-cell table:style-name="ce106" table:content-validation-name="val3"/>
          <table:table-cell table:number-columns-repeated="122"/>
        </table:table-row>
        <table:table-row table:style-name="ro5">
          <table:table-cell table:style-name="ce21"/>
          <table:table-cell table:style-name="ce53" office:value-type="string" calcext:value-type="string">
            <text:p>Solo Versionar el Paquete Principal</text:p>
          </table:table-cell>
          <table:table-cell table:style-name="ce76" table:content-validation-name="val1" office:value-type="string" calcext:value-type="string">
            <text:p>Media</text:p>
          </table:table-cell>
          <table:table-cell table:style-name="ce32" table:content-validation-name="val2" office:value-type="string" calcext:value-type="string">
            <text:p>Terminado</text:p>
          </table:table-cell>
          <table:table-cell table:style-name="ce96" table:content-validation-name="val3" office:value-type="date" office:date-value="2018-01-10" calcext:value-type="date">
            <text:p>10/01/18</text:p>
          </table:table-cell>
          <table:table-cell table:style-name="ce102" table:content-validation-name="val3" office:value-type="string" calcext:value-type="string">
            <text:p>1.00.2018-01-10</text:p>
          </table:table-cell>
          <table:table-cell table:style-name="ce107" table:content-validation-name="val3"/>
          <table:table-cell table:number-columns-repeated="122"/>
        </table:table-row>
        <table:table-row table:style-name="ro6">
          <table:table-cell table:style-name="ce21"/>
          <table:table-cell table:style-name="ce53" office:value-type="string" calcext:value-type="string">
            <text:p>Sacar la variable @version de todas las clases y usar __version__ en el paquete estructura</text:p>
          </table:table-cell>
          <table:table-cell table:style-name="ce77" table:content-validation-name="val1" office:value-type="string" calcext:value-type="string">
            <text:p>Media</text:p>
          </table:table-cell>
          <table:table-cell table:style-name="ce32" table:content-validation-name="val2" office:value-type="string" calcext:value-type="string">
            <text:p>Terminado</text:p>
          </table:table-cell>
          <table:table-cell table:style-name="ce96" table:content-validation-name="val3" office:value-type="date" office:date-value="2018-01-10" calcext:value-type="date">
            <text:p>10/01/18</text:p>
          </table:table-cell>
          <table:table-cell table:style-name="ce132" table:content-validation-name="val3" office:value-type="string" calcext:value-type="string">
            <text:p>1.00.2018-01-10</text:p>
          </table:table-cell>
          <table:table-cell table:style-name="ce107" table:content-validation-name="val3"/>
          <table:table-cell table:number-columns-repeated="122"/>
        </table:table-row>
        <table:table-row table:style-name="ro1">
          <table:table-cell table:style-name="ce20"/>
          <table:table-cell table:style-name="ce38"/>
          <table:table-cell table:style-name="ce62" table:content-validation-name="val1"/>
          <table:table-cell table:style-name="ce32" table:content-validation-name="val2"/>
          <table:table-cell table:style-name="ce96" table:content-validation-name="val3"/>
          <table:table-cell table:style-name="ce102" table:content-validation-name="val3"/>
          <table:table-cell table:style-name="ce107" table:content-validation-name="val3"/>
          <table:table-cell table:style-name="Default" table:number-columns-repeated="3"/>
          <table:table-cell table:number-columns-repeated="119"/>
        </table:table-row>
        <table:table-row table:style-name="ro1">
          <table:table-cell table:style-name="ce21"/>
          <table:table-cell table:style-name="ce39"/>
          <table:table-cell table:style-name="ce62" table:content-validation-name="val1"/>
          <table:table-cell table:style-name="ce32" table:content-validation-name="val2"/>
          <table:table-cell table:style-name="ce96" table:content-validation-name="val3"/>
          <table:table-cell table:style-name="ce102" table:content-validation-name="val3"/>
          <table:table-cell table:style-name="ce107" table:content-validation-name="val3"/>
          <table:table-cell table:style-name="Default" table:number-columns-repeated="3"/>
          <table:table-cell table:number-columns-repeated="119"/>
        </table:table-row>
        <table:table-row table:style-name="ro1">
          <table:table-cell table:style-name="ce21"/>
          <table:table-cell table:style-name="ce39"/>
          <table:table-cell table:style-name="ce62" table:content-validation-name="val1"/>
          <table:table-cell table:style-name="ce81" table:content-validation-name="val2"/>
          <table:table-cell table:style-name="ce96" table:content-validation-name="val3"/>
          <table:table-cell table:style-name="ce102" table:content-validation-name="val3"/>
          <table:table-cell table:style-name="ce107" table:content-validation-name="val3"/>
          <table:table-cell table:style-name="Default" table:number-columns-repeated="3"/>
          <table:table-cell table:number-columns-repeated="119"/>
        </table:table-row>
        <table:table-row table:style-name="ro1" table:number-rows-repeated="2">
          <table:table-cell table:style-name="ce22"/>
          <table:table-cell table:style-name="ce40"/>
          <table:table-cell table:style-name="ce62" table:content-validation-name="val1"/>
          <table:table-cell table:style-name="ce32" table:content-validation-name="val2"/>
          <table:table-cell table:style-name="ce96" table:content-validation-name="val3"/>
          <table:table-cell table:style-name="ce102" table:content-validation-name="val3"/>
          <table:table-cell table:style-name="ce107" table:content-validation-name="val3"/>
          <table:table-cell table:style-name="Default" table:number-columns-repeated="3"/>
          <table:table-cell table:number-columns-repeated="119"/>
        </table:table-row>
        <table:table-row table:style-name="ro1" table:number-rows-repeated="2">
          <table:table-cell table:style-name="ce23"/>
          <table:table-cell table:style-name="ce54"/>
          <table:table-cell table:style-name="ce62" table:content-validation-name="val1"/>
          <table:table-cell table:style-name="ce32" table:content-validation-name="val2"/>
          <table:table-cell table:style-name="ce96" table:content-validation-name="val3"/>
          <table:table-cell table:style-name="ce102" table:content-validation-name="val3"/>
          <table:table-cell table:style-name="ce107" table:content-validation-name="val3"/>
          <table:table-cell table:style-name="Default" table:number-columns-repeated="3"/>
          <table:table-cell table:number-columns-repeated="119"/>
        </table:table-row>
        <table:table-row table:style-name="ro1">
          <table:table-cell table:style-name="ce24"/>
          <table:table-cell table:style-name="ce55"/>
          <table:table-cell table:style-name="ce62" table:content-validation-name="val1"/>
          <table:table-cell table:style-name="ce32" table:content-validation-name="val2"/>
          <table:table-cell table:style-name="ce96" table:content-validation-name="val3"/>
          <table:table-cell table:style-name="ce102" table:content-validation-name="val3"/>
          <table:table-cell table:style-name="ce107" table:content-validation-name="val3"/>
          <table:table-cell table:style-name="Default" table:number-columns-repeated="3"/>
          <table:table-cell table:number-columns-repeated="119"/>
        </table:table-row>
        <table:table-row table:style-name="ro1" table:number-rows-repeated="2">
          <table:table-cell table:style-name="ce34"/>
          <table:table-cell table:style-name="ce56"/>
          <table:table-cell table:style-name="ce62" table:content-validation-name="val1"/>
          <table:table-cell table:style-name="ce32" table:content-validation-name="val2"/>
          <table:table-cell table:style-name="ce96" table:content-validation-name="val3"/>
          <table:table-cell table:style-name="ce102" table:content-validation-name="val3"/>
          <table:table-cell table:style-name="ce107" table:content-validation-name="val3"/>
          <table:table-cell table:style-name="Default" table:number-columns-repeated="3"/>
          <table:table-cell table:number-columns-repeated="119"/>
        </table:table-row>
        <table:table-row table:style-name="ro1">
          <table:table-cell table:style-name="ce24"/>
          <table:table-cell table:style-name="ce55"/>
          <table:table-cell table:style-name="ce62" table:content-validation-name="val1"/>
          <table:table-cell table:style-name="ce32" table:content-validation-name="val2"/>
          <table:table-cell table:style-name="ce96" table:content-validation-name="val3"/>
          <table:table-cell table:style-name="ce102" table:content-validation-name="val3"/>
          <table:table-cell table:style-name="ce107" table:content-validation-name="val3"/>
          <table:table-cell table:style-name="Default" table:number-columns-repeated="3"/>
          <table:table-cell table:number-columns-repeated="119"/>
        </table:table-row>
        <table:table-row table:style-name="ro1" table:number-rows-repeated="3">
          <table:table-cell table:style-name="ce24"/>
          <table:table-cell table:style-name="ce55"/>
          <table:table-cell table:style-name="ce62" table:content-validation-name="val1"/>
          <table:table-cell table:style-name="ce32" table:content-validation-name="val2"/>
          <table:table-cell table:style-name="ce96" table:content-validation-name="val3"/>
          <table:table-cell table:style-name="ce102" table:content-validation-name="val3"/>
          <table:table-cell table:style-name="ce107" table:content-validation-name="val3"/>
          <table:table-cell table:number-columns-repeated="122"/>
        </table:table-row>
        <table:table-row table:style-name="ro1">
          <table:table-cell table:style-name="ce23"/>
          <table:table-cell table:style-name="ce54"/>
          <table:table-cell table:style-name="ce62" table:content-validation-name="val1"/>
          <table:table-cell table:style-name="ce32" table:content-validation-name="val2"/>
          <table:table-cell table:style-name="ce96" table:content-validation-name="val3"/>
          <table:table-cell table:style-name="ce102" table:content-validation-name="val3"/>
          <table:table-cell table:style-name="ce107" table:content-validation-name="val3"/>
          <table:table-cell table:number-columns-repeated="122"/>
        </table:table-row>
        <table:table-row table:style-name="ro1">
          <table:table-cell table:style-name="ce35"/>
          <table:table-cell table:style-name="ce57"/>
          <table:table-cell table:style-name="ce62" table:content-validation-name="val1"/>
          <table:table-cell table:style-name="ce32" table:content-validation-name="val2"/>
          <table:table-cell table:style-name="ce96" table:content-validation-name="val3"/>
          <table:table-cell table:style-name="ce102" table:content-validation-name="val3"/>
          <table:table-cell table:style-name="ce107" table:content-validation-name="val3"/>
          <table:table-cell table:number-columns-repeated="122"/>
        </table:table-row>
        <table:table-row table:style-name="ro1">
          <table:table-cell table:style-name="ce23"/>
          <table:table-cell table:style-name="ce54"/>
          <table:table-cell table:style-name="ce62" table:content-validation-name="val1"/>
          <table:table-cell table:style-name="ce32" table:content-validation-name="val2"/>
          <table:table-cell table:style-name="ce96" table:content-validation-name="val3"/>
          <table:table-cell table:style-name="ce102" table:content-validation-name="val3"/>
          <table:table-cell table:style-name="ce107" table:content-validation-name="val3"/>
          <table:table-cell table:number-columns-repeated="122"/>
        </table:table-row>
        <table:table-row table:style-name="ro1">
          <table:table-cell table:style-name="ce23"/>
          <table:table-cell table:style-name="ce54"/>
          <table:table-cell table:style-name="ce63" table:content-validation-name="val1"/>
          <table:table-cell table:style-name="ce32" table:content-validation-name="val2"/>
          <table:table-cell table:style-name="ce97" table:content-validation-name="val3"/>
          <table:table-cell table:style-name="ce103" table:content-validation-name="val3"/>
          <table:table-cell table:style-name="ce108" table:content-validation-name="val3"/>
          <table:table-cell table:number-columns-repeated="122"/>
        </table:table-row>
        <table:table-row table:style-name="ro1" table:number-rows-repeated="2">
          <table:table-cell table:style-name="ce23"/>
          <table:table-cell table:style-name="ce54"/>
          <table:table-cell table:style-name="ce62" table:content-validation-name="val1"/>
          <table:table-cell table:style-name="ce32" table:content-validation-name="val2"/>
          <table:table-cell table:style-name="ce96" table:content-validation-name="val3"/>
          <table:table-cell table:style-name="ce102" table:content-validation-name="val3"/>
          <table:table-cell table:style-name="ce107" table:content-validation-name="val3"/>
          <table:table-cell table:number-columns-repeated="122"/>
        </table:table-row>
        <table:table-row table:style-name="ro1">
          <table:table-cell table:style-name="ce36"/>
          <table:table-cell table:style-name="ce58"/>
          <table:table-cell table:style-name="ce64" table:content-validation-name="val1"/>
          <table:table-cell table:style-name="ce32" table:content-validation-name="val2"/>
          <table:table-cell table:style-name="ce98" table:content-validation-name="val3"/>
          <table:table-cell table:style-name="ce104" table:content-validation-name="val3"/>
          <table:table-cell table:style-name="ce109" table:content-validation-name="val3"/>
          <table:table-cell table:number-columns-repeated="122"/>
        </table:table-row>
        <table:table-row table:style-name="ro1">
          <table:table-cell table:style-name="ce23"/>
          <table:table-cell table:style-name="ce59"/>
          <table:table-cell table:style-name="ce62" table:content-validation-name="val1"/>
          <table:table-cell table:style-name="ce32" table:content-validation-name="val2"/>
          <table:table-cell table:style-name="ce96" table:content-validation-name="val3"/>
          <table:table-cell table:style-name="ce102" table:content-validation-name="val3"/>
          <table:table-cell table:style-name="ce107" table:content-validation-name="val3"/>
          <table:table-cell table:number-columns-repeated="122"/>
        </table:table-row>
        <table:table-row table:style-name="ro1" table:number-rows-repeated="2">
          <table:table-cell table:style-name="ce23"/>
          <table:table-cell table:style-name="ce54"/>
          <table:table-cell table:style-name="ce62" table:content-validation-name="val1"/>
          <table:table-cell table:style-name="ce32" table:content-validation-name="val2"/>
          <table:table-cell table:style-name="ce96" table:content-validation-name="val3"/>
          <table:table-cell table:style-name="ce102" table:content-validation-name="val3"/>
          <table:table-cell table:style-name="ce107" table:content-validation-name="val3"/>
          <table:table-cell table:number-columns-repeated="122"/>
        </table:table-row>
        <table:table-row table:style-name="ro1">
          <table:table-cell table:style-name="ce37"/>
          <table:table-cell table:style-name="ce60"/>
          <table:table-cell table:style-name="ce65" table:content-validation-name="val1"/>
          <table:table-cell table:style-name="ce33" table:content-validation-name="val2"/>
          <table:table-cell table:style-name="ce99" table:content-validation-name="val3"/>
          <table:table-cell table:style-name="ce105" table:content-validation-name="val3"/>
          <table:table-cell table:style-name="ce110" table:content-validation-name="val3"/>
          <table:table-cell table:number-columns-repeated="122"/>
        </table:table-row>
        <table:table-row table:style-name="ro1" table:number-rows-repeated="94">
          <table:table-cell table:number-columns-repeated="129"/>
        </table:table-row>
        <table:table-row table:style-name="ro1">
          <table:table-cell table:number-columns-repeated="129"/>
        </table:table-row>
        <table:named-expressions>
          <table:named-expression table:name="Print_Area" table:base-cell-address="$'TO-DO'.$A$1" table:expression="#REF!"/>
          <table:named-expression table:name="Sheet_Title" table:base-cell-address="$'TO-DO'.$A$1" table:expression="&quot;Estructura&quot;"/>
        </table:named-expressions>
        <calcext:conditional-formats>
          <calcext:conditional-format calcext:target-range-address="'TO-DO'.D5:'TO-DO'.D32">
            <calcext:condition calcext:apply-style-name="Gnumeric-1" calcext:value="=&quot;Sin Iniciar&quot;" calcext:base-cell-address="'TO-DO'.D5"/>
            <calcext:condition calcext:apply-style-name="Gnumeric-1" calcext:value="=&quot;Pendiente&quot;" calcext:base-cell-address="'TO-DO'.D5"/>
            <calcext:condition calcext:apply-style-name="Gnumeric-3" calcext:value="=&quot;Activo&quot;" calcext:base-cell-address="'TO-DO'.D5"/>
            <calcext:condition calcext:apply-style-name="Estado_En_Proceso" calcext:value="=&quot;En Proceso&quot;" calcext:base-cell-address="'TO-DO'.D5"/>
            <calcext:condition calcext:apply-style-name="Estado_Terminado" calcext:value="=&quot;Terminado&quot;" calcext:base-cell-address="'TO-DO'.D5"/>
          </calcext:conditional-format>
          <calcext:conditional-format calcext:target-range-address="'TO-DO'.B8:'TO-DO'.B32 'TO-DO'.B5:'TO-DO'.B5">
            <calcext:condition calcext:apply-style-name="Estado_Terminado_Tachado" calcext:value="formula-is(['TO-DO'.$D5]=&quot;Terminado&quot;)" calcext:base-cell-address="'TO-DO'.B5"/>
            <calcext:condition calcext:apply-style-name="Estado_En_Proceso" calcext:value="formula-is(['TO-DO'.$D5]=&quot;En Proceso&quot;)" calcext:base-cell-address="'TO-DO'.B5"/>
          </calcext:conditional-format>
          <calcext:conditional-format calcext:target-range-address="'TO-DO'.A5:'TO-DO'.A32">
            <calcext:condition calcext:apply-style-name="Estado_Terminado_Tachado" calcext:value="formula-is(['TO-DO'.$D5]=&quot;Terminado&quot;)" calcext:base-cell-address="'TO-DO'.A5"/>
            <calcext:condition calcext:apply-style-name="Estado_En_Proceso" calcext:value="formula-is(['TO-DO'.$D5]=&quot;En Proceso&quot;)" calcext:base-cell-address="'TO-DO'.A5"/>
          </calcext:conditional-format>
          <calcext:conditional-format calcext:target-range-address="'TO-DO'.E5:'TO-DO'.E32">
            <calcext:condition calcext:apply-style-name="Estado_Terminado" calcext:value="formula-is(['TO-DO'.$D5]=&quot;Terminado&quot;)" calcext:base-cell-address="'TO-DO'.E5"/>
            <calcext:condition calcext:apply-style-name="Estado_En_Proceso" calcext:value="formula-is(['TO-DO'.$D5]=&quot;En Proceso&quot;)" calcext:base-cell-address="'TO-DO'.E5"/>
          </calcext:conditional-format>
          <calcext:conditional-format calcext:target-range-address="'TO-DO'.F8:'TO-DO'.F32 'TO-DO'.F5:'TO-DO'.F6">
            <calcext:condition calcext:apply-style-name="Estado_Terminado" calcext:value="formula-is(['TO-DO'.$D5]=&quot;Terminado&quot;)" calcext:base-cell-address="'TO-DO'.F5"/>
            <calcext:condition calcext:apply-style-name="Estado_En_Proceso" calcext:value="formula-is(['TO-DO'.$D5]=&quot;En Proceso&quot;)" calcext:base-cell-address="'TO-DO'.F5"/>
          </calcext:conditional-format>
          <calcext:conditional-format calcext:target-range-address="'TO-DO'.G5:'TO-DO'.G32">
            <calcext:condition calcext:apply-style-name="Estado_Terminado" calcext:value="formula-is(['TO-DO'.$D5]=&quot;Terminado&quot;)" calcext:base-cell-address="'TO-DO'.G5"/>
            <calcext:condition calcext:apply-style-name="Estado_En_Proceso" calcext:value="formula-is(['TO-DO'.$D5]=&quot;En Proceso&quot;)" calcext:base-cell-address="'TO-DO'.G5"/>
          </calcext:conditional-format>
          <calcext:conditional-format calcext:target-range-address="'TO-DO'.C8:'TO-DO'.C32 'TO-DO'.C5:'TO-DO'.C5">
            <calcext:condition calcext:apply-style-name="Estado_Terminado" calcext:value="formula-is(['TO-DO'.$D5]=&quot;Terminado&quot;)" calcext:base-cell-address="'TO-DO'.C5"/>
            <calcext:condition calcext:apply-style-name="PR_Alta" calcext:value="=&quot;Alta&quot;" calcext:base-cell-address="'TO-DO'.C5"/>
            <calcext:condition calcext:apply-style-name="PR_Media" calcext:value="=&quot;Media&quot;" calcext:base-cell-address="'TO-DO'.C5"/>
            <calcext:condition calcext:apply-style-name="PR_Baja" calcext:value="=&quot;Baja&quot;" calcext:base-cell-address="'TO-DO'.C5"/>
            <calcext:condition calcext:apply-style-name="Estado_En_Proceso" calcext:value="formula-is(['TO-DO'.$D5]=&quot;En Proceso&quot;)" calcext:base-cell-address="'TO-DO'.C5"/>
          </calcext:conditional-format>
          <calcext:conditional-format calcext:target-range-address="'TO-DO'.B6:'TO-DO'.B7">
            <calcext:condition calcext:apply-style-name="Estado_Terminado_Tachado" calcext:value="formula-is(['TO-DO'.$D6]=&quot;Terminado&quot;)" calcext:base-cell-address="'TO-DO'.B6"/>
            <calcext:condition calcext:apply-style-name="Estado_En_Proceso" calcext:value="formula-is(['TO-DO'.$D6]=&quot;En Proceso&quot;)" calcext:base-cell-address="'TO-DO'.B6"/>
          </calcext:conditional-format>
          <calcext:conditional-format calcext:target-range-address="'TO-DO'.C6:'TO-DO'.C7">
            <calcext:condition calcext:apply-style-name="Estado_Terminado" calcext:value="formula-is(['TO-DO'.$D6]=&quot;Terminado&quot;)" calcext:base-cell-address="'TO-DO'.C6"/>
            <calcext:condition calcext:apply-style-name="PR_Alta" calcext:value="=&quot;Alta&quot;" calcext:base-cell-address="'TO-DO'.C6"/>
            <calcext:condition calcext:apply-style-name="PR_Media" calcext:value="=&quot;Media&quot;" calcext:base-cell-address="'TO-DO'.C6"/>
            <calcext:condition calcext:apply-style-name="PR_Baja" calcext:value="=&quot;Baja&quot;" calcext:base-cell-address="'TO-DO'.C6"/>
            <calcext:condition calcext:apply-style-name="Estado_En_Proceso" calcext:value="formula-is(['TO-DO'.$D6]=&quot;En Proceso&quot;)" calcext:base-cell-address="'TO-DO'.C6"/>
          </calcext:conditional-format>
          <calcext:conditional-format calcext:target-range-address="'TO-DO'.F7:'TO-DO'.F7">
            <calcext:condition calcext:apply-style-name="Estado_Terminado" calcext:value="formula-is(['TO-DO'.$D7]=&quot;Terminado&quot;)" calcext:base-cell-address="'TO-DO'.F7"/>
            <calcext:condition calcext:apply-style-name="Estado_En_Proceso" calcext:value="formula-is(['TO-DO'.$D7]=&quot;En Proceso&quot;)" calcext:base-cell-address="'TO-DO'.F7"/>
          </calcext:conditional-format>
        </calcext:conditional-formats>
      </table:table>
      <table:table table:name="Bugs" table:style-name="ta2">
        <table:table-column table:style-name="co3" table:default-cell-style-name="ce6"/>
        <table:table-column table:style-name="co4" table:default-cell-style-name="ce6"/>
        <table:table-column table:style-name="co1" table:number-columns-repeated="2" table:default-cell-style-name="ce6"/>
        <table:table-column table:style-name="co5" table:default-cell-style-name="ce6"/>
        <table:table-column table:style-name="co9" table:default-cell-style-name="ce6"/>
        <table:table-column table:style-name="co7" table:default-cell-style-name="ce6"/>
        <table:table-column table:style-name="co8" table:number-columns-repeated="122" table:default-cell-style-name="ce6"/>
        <table:table-row table:style-name="ro4">
          <table:table-cell table:style-name="ce29" office:value-type="string" calcext:value-type="string">
            <text:p>Bugs</text:p>
          </table:table-cell>
          <table:table-cell table:style-name="ce29" table:formula="of:=+['TO-DO'.B1]" office:value-type="string" office:string-value="Helpers" calcext:value-type="string">
            <text:p>Helpers</text:p>
          </table:table-cell>
          <table:table-cell table:style-name="ce29" table:number-columns-repeated="5"/>
          <table:table-cell table:number-columns-repeated="122"/>
        </table:table-row>
        <table:table-row table:style-name="ro1" table:number-rows-repeated="2">
          <table:table-cell table:number-columns-repeated="5"/>
          <table:table-cell table:style-name="ce821"/>
          <table:table-cell table:number-columns-repeated="123"/>
        </table:table-row>
        <table:table-row table:style-name="ro1">
          <table:table-cell table:style-name="ce1151" office:value-type="string" calcext:value-type="string">
            <text:p>ID</text:p>
          </table:table-cell>
          <table:table-cell table:style-name="ce1151" office:value-type="string" calcext:value-type="string">
            <text:p>Descripcion</text:p>
          </table:table-cell>
          <table:table-cell table:style-name="ce1151" office:value-type="string" calcext:value-type="string">
            <text:p>Prioridad</text:p>
          </table:table-cell>
          <table:table-cell table:style-name="ce1151" office:value-type="string" calcext:value-type="string">
            <text:p>Estado</text:p>
          </table:table-cell>
          <table:table-cell table:style-name="ce1151" office:value-type="string" calcext:value-type="string">
            <text:p>Fecha</text:p>
          </table:table-cell>
          <table:table-cell table:style-name="ce1151" office:value-type="string" calcext:value-type="string">
            <text:p>Version</text:p>
          </table:table-cell>
          <table:table-cell table:style-name="ce1151" office:value-type="string" calcext:value-type="string">
            <text:p>Notas</text:p>
          </table:table-cell>
          <table:table-cell table:number-columns-repeated="122"/>
        </table:table-row>
        <table:table-row table:style-name="ro1">
          <table:table-cell table:style-name="ce111"/>
          <table:table-cell table:style-name="ce120"/>
          <table:table-cell table:style-name="ce130" table:content-validation-name="val1"/>
          <table:table-cell table:style-name="ce136" table:content-validation-name="val2"/>
          <table:table-cell table:style-name="ce139" table:content-validation-name="val3"/>
          <table:table-cell table:style-name="ce144" table:content-validation-name="val3"/>
          <table:table-cell table:style-name="ce149" table:content-validation-name="val3"/>
          <table:table-cell table:number-columns-repeated="122"/>
        </table:table-row>
        <table:table-row table:style-name="ro1" table:number-rows-repeated="2">
          <table:table-cell table:style-name="ce112"/>
          <table:table-cell table:style-name="ce121"/>
          <table:table-cell table:style-name="ce166" table:content-validation-name="val1"/>
          <table:table-cell table:style-name="ce136" table:content-validation-name="val2"/>
          <table:table-cell table:style-name="ce174" table:content-validation-name="val3"/>
          <table:table-cell table:style-name="ce179" table:content-validation-name="val3"/>
          <table:table-cell table:style-name="ce184" table:content-validation-name="val3"/>
          <table:table-cell table:number-columns-repeated="122"/>
        </table:table-row>
        <table:table-row table:style-name="ro1">
          <table:table-cell table:style-name="ce111"/>
          <table:table-cell table:style-name="ce120"/>
          <table:table-cell table:style-name="ce166" table:content-validation-name="val1"/>
          <table:table-cell table:style-name="ce136" table:content-validation-name="val2"/>
          <table:table-cell table:style-name="ce174" table:content-validation-name="val3"/>
          <table:table-cell table:style-name="ce179" table:content-validation-name="val3"/>
          <table:table-cell table:style-name="ce184" table:content-validation-name="val3"/>
          <table:table-cell table:style-name="Default" table:number-columns-repeated="3"/>
          <table:table-cell table:number-columns-repeated="119"/>
        </table:table-row>
        <table:table-row table:style-name="ro1">
          <table:table-cell table:style-name="ce112"/>
          <table:table-cell table:style-name="ce121"/>
          <table:table-cell table:style-name="ce166" table:content-validation-name="val1"/>
          <table:table-cell table:style-name="ce136" table:content-validation-name="val2"/>
          <table:table-cell table:style-name="ce174" table:content-validation-name="val3"/>
          <table:table-cell table:style-name="ce179" table:content-validation-name="val3"/>
          <table:table-cell table:style-name="ce184" table:content-validation-name="val3"/>
          <table:table-cell table:style-name="Default" table:number-columns-repeated="3"/>
          <table:table-cell table:number-columns-repeated="119"/>
        </table:table-row>
        <table:table-row table:style-name="ro1">
          <table:table-cell table:style-name="ce112"/>
          <table:table-cell table:style-name="ce121"/>
          <table:table-cell table:style-name="ce166" table:content-validation-name="val1"/>
          <table:table-cell table:style-name="ce171" table:content-validation-name="val2"/>
          <table:table-cell table:style-name="ce174" table:content-validation-name="val3"/>
          <table:table-cell table:style-name="ce179" table:content-validation-name="val3"/>
          <table:table-cell table:style-name="ce184" table:content-validation-name="val3"/>
          <table:table-cell table:style-name="Default" table:number-columns-repeated="3"/>
          <table:table-cell table:number-columns-repeated="119"/>
        </table:table-row>
        <table:table-row table:style-name="ro1" table:number-rows-repeated="2">
          <table:table-cell table:style-name="ce113"/>
          <table:table-cell table:style-name="ce122"/>
          <table:table-cell table:style-name="ce166" table:content-validation-name="val1"/>
          <table:table-cell table:style-name="ce136" table:content-validation-name="val2"/>
          <table:table-cell table:style-name="ce174" table:content-validation-name="val3"/>
          <table:table-cell table:style-name="ce179" table:content-validation-name="val3"/>
          <table:table-cell table:style-name="ce184" table:content-validation-name="val3"/>
          <table:table-cell table:style-name="Default" table:number-columns-repeated="3"/>
          <table:table-cell table:number-columns-repeated="119"/>
        </table:table-row>
        <table:table-row table:style-name="ro1" table:number-rows-repeated="2">
          <table:table-cell table:style-name="ce114"/>
          <table:table-cell table:style-name="ce123"/>
          <table:table-cell table:style-name="ce166" table:content-validation-name="val1"/>
          <table:table-cell table:style-name="ce136" table:content-validation-name="val2"/>
          <table:table-cell table:style-name="ce174" table:content-validation-name="val3"/>
          <table:table-cell table:style-name="ce179" table:content-validation-name="val3"/>
          <table:table-cell table:style-name="ce184" table:content-validation-name="val3"/>
          <table:table-cell table:style-name="Default" table:number-columns-repeated="3"/>
          <table:table-cell table:number-columns-repeated="119"/>
        </table:table-row>
        <table:table-row table:style-name="ro1">
          <table:table-cell table:style-name="ce115"/>
          <table:table-cell table:style-name="ce124"/>
          <table:table-cell table:style-name="ce166" table:content-validation-name="val1"/>
          <table:table-cell table:style-name="ce136" table:content-validation-name="val2"/>
          <table:table-cell table:style-name="ce174" table:content-validation-name="val3"/>
          <table:table-cell table:style-name="ce179" table:content-validation-name="val3"/>
          <table:table-cell table:style-name="ce184" table:content-validation-name="val3"/>
          <table:table-cell table:style-name="Default" table:number-columns-repeated="3"/>
          <table:table-cell table:number-columns-repeated="119"/>
        </table:table-row>
        <table:table-row table:style-name="ro1" table:number-rows-repeated="2">
          <table:table-cell table:style-name="ce116"/>
          <table:table-cell table:style-name="ce125"/>
          <table:table-cell table:style-name="ce166" table:content-validation-name="val1"/>
          <table:table-cell table:style-name="ce136" table:content-validation-name="val2"/>
          <table:table-cell table:style-name="ce174" table:content-validation-name="val3"/>
          <table:table-cell table:style-name="ce179" table:content-validation-name="val3"/>
          <table:table-cell table:style-name="ce184" table:content-validation-name="val3"/>
          <table:table-cell table:style-name="Default" table:number-columns-repeated="3"/>
          <table:table-cell table:number-columns-repeated="119"/>
        </table:table-row>
        <table:table-row table:style-name="ro1">
          <table:table-cell table:style-name="ce115"/>
          <table:table-cell table:style-name="ce124"/>
          <table:table-cell table:style-name="ce166" table:content-validation-name="val1"/>
          <table:table-cell table:style-name="ce136" table:content-validation-name="val2"/>
          <table:table-cell table:style-name="ce174" table:content-validation-name="val3"/>
          <table:table-cell table:style-name="ce179" table:content-validation-name="val3"/>
          <table:table-cell table:style-name="ce184" table:content-validation-name="val3"/>
          <table:table-cell table:style-name="Default" table:number-columns-repeated="3"/>
          <table:table-cell table:number-columns-repeated="119"/>
        </table:table-row>
        <table:table-row table:style-name="ro1" table:number-rows-repeated="3">
          <table:table-cell table:style-name="ce115"/>
          <table:table-cell table:style-name="ce124"/>
          <table:table-cell table:style-name="ce166" table:content-validation-name="val1"/>
          <table:table-cell table:style-name="ce136" table:content-validation-name="val2"/>
          <table:table-cell table:style-name="ce174" table:content-validation-name="val3"/>
          <table:table-cell table:style-name="ce179" table:content-validation-name="val3"/>
          <table:table-cell table:style-name="ce184" table:content-validation-name="val3"/>
          <table:table-cell table:number-columns-repeated="122"/>
        </table:table-row>
        <table:table-row table:style-name="ro1">
          <table:table-cell table:style-name="ce114"/>
          <table:table-cell table:style-name="ce123"/>
          <table:table-cell table:style-name="ce166" table:content-validation-name="val1"/>
          <table:table-cell table:style-name="ce136" table:content-validation-name="val2"/>
          <table:table-cell table:style-name="ce174" table:content-validation-name="val3"/>
          <table:table-cell table:style-name="ce179" table:content-validation-name="val3"/>
          <table:table-cell table:style-name="ce184" table:content-validation-name="val3"/>
          <table:table-cell table:number-columns-repeated="122"/>
        </table:table-row>
        <table:table-row table:style-name="ro1">
          <table:table-cell table:style-name="ce117"/>
          <table:table-cell table:style-name="ce126"/>
          <table:table-cell table:style-name="ce166" table:content-validation-name="val1"/>
          <table:table-cell table:style-name="ce136" table:content-validation-name="val2"/>
          <table:table-cell table:style-name="ce174" table:content-validation-name="val3"/>
          <table:table-cell table:style-name="ce179" table:content-validation-name="val3"/>
          <table:table-cell table:style-name="ce184" table:content-validation-name="val3"/>
          <table:table-cell table:number-columns-repeated="122"/>
        </table:table-row>
        <table:table-row table:style-name="ro1">
          <table:table-cell table:style-name="ce114"/>
          <table:table-cell table:style-name="ce123"/>
          <table:table-cell table:style-name="ce166" table:content-validation-name="val1"/>
          <table:table-cell table:style-name="ce136" table:content-validation-name="val2"/>
          <table:table-cell table:style-name="ce174" table:content-validation-name="val3"/>
          <table:table-cell table:style-name="ce179" table:content-validation-name="val3"/>
          <table:table-cell table:style-name="ce184" table:content-validation-name="val3"/>
          <table:table-cell table:number-columns-repeated="122"/>
        </table:table-row>
        <table:table-row table:style-name="ro1">
          <table:table-cell table:style-name="ce114"/>
          <table:table-cell table:style-name="ce123"/>
          <table:table-cell table:style-name="ce167" table:content-validation-name="val1"/>
          <table:table-cell table:style-name="ce136" table:content-validation-name="val2"/>
          <table:table-cell table:style-name="ce175" table:content-validation-name="val3"/>
          <table:table-cell table:style-name="ce180" table:content-validation-name="val3"/>
          <table:table-cell table:style-name="ce185" table:content-validation-name="val3"/>
          <table:table-cell table:number-columns-repeated="122"/>
        </table:table-row>
        <table:table-row table:style-name="ro1" table:number-rows-repeated="2">
          <table:table-cell table:style-name="ce114"/>
          <table:table-cell table:style-name="ce123"/>
          <table:table-cell table:style-name="ce166" table:content-validation-name="val1"/>
          <table:table-cell table:style-name="ce136" table:content-validation-name="val2"/>
          <table:table-cell table:style-name="ce174" table:content-validation-name="val3"/>
          <table:table-cell table:style-name="ce179" table:content-validation-name="val3"/>
          <table:table-cell table:style-name="ce184" table:content-validation-name="val3"/>
          <table:table-cell table:number-columns-repeated="122"/>
        </table:table-row>
        <table:table-row table:style-name="ro1">
          <table:table-cell table:style-name="ce118"/>
          <table:table-cell table:style-name="ce127"/>
          <table:table-cell table:style-name="ce168" table:content-validation-name="val1"/>
          <table:table-cell table:style-name="ce136" table:content-validation-name="val2"/>
          <table:table-cell table:style-name="ce176" table:content-validation-name="val3"/>
          <table:table-cell table:style-name="ce181" table:content-validation-name="val3"/>
          <table:table-cell table:style-name="ce186" table:content-validation-name="val3"/>
          <table:table-cell table:number-columns-repeated="122"/>
        </table:table-row>
        <table:table-row table:style-name="ro1">
          <table:table-cell table:style-name="ce114"/>
          <table:table-cell table:style-name="ce128"/>
          <table:table-cell table:style-name="ce166" table:content-validation-name="val1"/>
          <table:table-cell table:style-name="ce136" table:content-validation-name="val2"/>
          <table:table-cell table:style-name="ce174" table:content-validation-name="val3"/>
          <table:table-cell table:style-name="ce179" table:content-validation-name="val3"/>
          <table:table-cell table:style-name="ce184" table:content-validation-name="val3"/>
          <table:table-cell table:number-columns-repeated="122"/>
        </table:table-row>
        <table:table-row table:style-name="ro1" table:number-rows-repeated="2">
          <table:table-cell table:style-name="ce114"/>
          <table:table-cell table:style-name="ce123"/>
          <table:table-cell table:style-name="ce166" table:content-validation-name="val1"/>
          <table:table-cell table:style-name="ce136" table:content-validation-name="val2"/>
          <table:table-cell table:style-name="ce174" table:content-validation-name="val3"/>
          <table:table-cell table:style-name="ce179" table:content-validation-name="val3"/>
          <table:table-cell table:style-name="ce184" table:content-validation-name="val3"/>
          <table:table-cell table:number-columns-repeated="122"/>
        </table:table-row>
        <table:table-row table:style-name="ro1">
          <table:table-cell table:style-name="ce119"/>
          <table:table-cell table:style-name="ce129"/>
          <table:table-cell table:style-name="ce169" table:content-validation-name="val1"/>
          <table:table-cell table:style-name="ce138" table:content-validation-name="val2"/>
          <table:table-cell table:style-name="ce177" table:content-validation-name="val3"/>
          <table:table-cell table:style-name="ce182" table:content-validation-name="val3"/>
          <table:table-cell table:style-name="ce187" table:content-validation-name="val3"/>
          <table:table-cell table:number-columns-repeated="122"/>
        </table:table-row>
        <table:table-row table:style-name="ro1" table:number-rows-repeated="94">
          <table:table-cell table:number-columns-repeated="129"/>
        </table:table-row>
        <table:table-row table:style-name="ro1">
          <table:table-cell table:number-columns-repeated="129"/>
        </table:table-row>
        <table:named-expressions>
          <table:named-expression table:name="Print_Area" table:base-cell-address="$Bugs.$A$1" table:expression="#REF!"/>
          <table:named-expression table:name="Sheet_Title" table:base-cell-address="$Bugs.$A$1" table:expression="&quot;Estructura&quot;"/>
        </table:named-expressions>
        <calcext:conditional-formats>
          <calcext:conditional-format calcext:target-range-address="Bugs.D5:Bugs.D32">
            <calcext:condition calcext:apply-style-name="Gnumeric-1" calcext:value="=&quot;Sin Iniciar&quot;" calcext:base-cell-address="Bugs.D5"/>
            <calcext:condition calcext:apply-style-name="Gnumeric-1" calcext:value="=&quot;Pendiente&quot;" calcext:base-cell-address="Bugs.D5"/>
            <calcext:condition calcext:apply-style-name="Gnumeric-3" calcext:value="=&quot;Activo&quot;" calcext:base-cell-address="Bugs.D5"/>
            <calcext:condition calcext:apply-style-name="Estado_En_Proceso" calcext:value="=&quot;En Proceso&quot;" calcext:base-cell-address="Bugs.D5"/>
            <calcext:condition calcext:apply-style-name="Estado_Terminado" calcext:value="=&quot;Terminado&quot;" calcext:base-cell-address="Bugs.D5"/>
          </calcext:conditional-format>
          <calcext:conditional-format calcext:target-range-address="Bugs.B24:Bugs.B32 Bugs.B5:Bugs.B22">
            <calcext:condition calcext:apply-style-name="Estado_Terminado_Tachado" calcext:value="formula-is([Bugs.$D5]=&quot;Terminado&quot;)" calcext:base-cell-address="Bugs.B5"/>
            <calcext:condition calcext:apply-style-name="Estado_En_Proceso" calcext:value="formula-is([Bugs.$D5]=&quot;En Proceso&quot;)" calcext:base-cell-address="Bugs.B5"/>
          </calcext:conditional-format>
          <calcext:conditional-format calcext:target-range-address="Bugs.A24:Bugs.A32 Bugs.A5:Bugs.A22">
            <calcext:condition calcext:apply-style-name="Estado_Terminado_Tachado" calcext:value="formula-is([Bugs.$D5]=&quot;Terminado&quot;)" calcext:base-cell-address="Bugs.A5"/>
            <calcext:condition calcext:apply-style-name="Estado_En_Proceso" calcext:value="formula-is([Bugs.$D5]=&quot;En Proceso&quot;)" calcext:base-cell-address="Bugs.A5"/>
          </calcext:conditional-format>
          <calcext:conditional-format calcext:target-range-address="Bugs.E5:Bugs.E32">
            <calcext:condition calcext:apply-style-name="Estado_Terminado" calcext:value="formula-is([Bugs.$D5]=&quot;Terminado&quot;)" calcext:base-cell-address="Bugs.E5"/>
            <calcext:condition calcext:apply-style-name="Estado_En_Proceso" calcext:value="formula-is([Bugs.$D5]=&quot;En Proceso&quot;)" calcext:base-cell-address="Bugs.E5"/>
          </calcext:conditional-format>
          <calcext:conditional-format calcext:target-range-address="Bugs.F5:Bugs.F32">
            <calcext:condition calcext:apply-style-name="Estado_Terminado" calcext:value="formula-is([Bugs.$D5]=&quot;Terminado&quot;)" calcext:base-cell-address="Bugs.F5"/>
            <calcext:condition calcext:apply-style-name="Estado_En_Proceso" calcext:value="formula-is([Bugs.$D5]=&quot;En Proceso&quot;)" calcext:base-cell-address="Bugs.F5"/>
          </calcext:conditional-format>
          <calcext:conditional-format calcext:target-range-address="Bugs.G5:Bugs.G32">
            <calcext:condition calcext:apply-style-name="Estado_Terminado" calcext:value="formula-is([Bugs.$D5]=&quot;Terminado&quot;)" calcext:base-cell-address="Bugs.G5"/>
            <calcext:condition calcext:apply-style-name="Estado_En_Proceso" calcext:value="formula-is([Bugs.$D5]=&quot;En Proceso&quot;)" calcext:base-cell-address="Bugs.G5"/>
          </calcext:conditional-format>
          <calcext:conditional-format calcext:target-range-address="Bugs.C5:Bugs.C32">
            <calcext:condition calcext:apply-style-name="Estado_Terminado" calcext:value="formula-is([Bugs.$D5]=&quot;Terminado&quot;)" calcext:base-cell-address="Bugs.C5"/>
            <calcext:condition calcext:apply-style-name="PR_Alta" calcext:value="=&quot;Alta&quot;" calcext:base-cell-address="Bugs.C5"/>
            <calcext:condition calcext:apply-style-name="PR_Media" calcext:value="=&quot;Media&quot;" calcext:base-cell-address="Bugs.C5"/>
            <calcext:condition calcext:apply-style-name="PR_Baja" calcext:value="=&quot;Baja&quot;" calcext:base-cell-address="Bugs.C5"/>
            <calcext:condition calcext:apply-style-name="Estado_En_Proceso" calcext:value="formula-is([Bugs.$D5]=&quot;En Proceso&quot;)" calcext:base-cell-address="Bugs.C5"/>
          </calcext:conditional-format>
          <calcext:conditional-format calcext:target-range-address="Bugs.B23:Bugs.B23">
            <calcext:condition calcext:apply-style-name="Estado_Terminado_Tachado" calcext:value="formula-is([Bugs.$D23]=&quot;Terminado&quot;)" calcext:base-cell-address="Bugs.B23"/>
            <calcext:condition calcext:apply-style-name="Estado_En_Proceso" calcext:value="formula-is([Bugs.$D23]=&quot;En Proceso&quot;)" calcext:base-cell-address="Bugs.B23"/>
          </calcext:conditional-format>
          <calcext:conditional-format calcext:target-range-address="Bugs.A23:Bugs.A23">
            <calcext:condition calcext:apply-style-name="Estado_Terminado_Tachado" calcext:value="formula-is([Bugs.$D23]=&quot;Terminado&quot;)" calcext:base-cell-address="Bugs.A23"/>
            <calcext:condition calcext:apply-style-name="Estado_En_Proceso" calcext:value="formula-is([Bugs.$D23]=&quot;En Proceso&quot;)" calcext:base-cell-address="Bugs.A23"/>
          </calcext:conditional-format>
        </calcext:conditional-formats>
      </table:table>
      <table:named-expressions>
        <table:named-range table:name="cfg_Estado" table:base-cell-address="$cfg.$A$6" table:cell-range-address="$cfg.$A$6:.$A$7" table:range-usable-as="repeat-column repeat-row filter print-range"/>
        <table:named-range table:name="Estado" table:base-cell-address="$cfg.$A$6" table:cell-range-address="$cfg.$A$6:.$A$11"/>
        <table:named-range table:name="Prioridad" table:base-cell-address="$cfg.$A$18" table:cell-range-address="$cfg.$A$15:.$A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Monospace" svg:font-family="Monospace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date-style style:name="N108">
      <number:day number:style="long"/>
      <number:text>/</number:text>
      <number:month number:style="long"/>
      <number:text>/</number:text>
      <number:year number:calendar="gregorian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1" style:family="table-cell" style:parent-style-name="Default">
      <style:table-cell-properties fo:background-color="#ff9966" style:cell-protect="protected" style:print-content="true" gnm:background-colour="#ff9966" gnm:pattern="1"/>
    </style:style>
    <style:style style:name="Estado_5f_En_5f_Proceso" style:display-name="Estado_En_Proceso" style:family="table-cell" style:parent-style-name="Default">
      <style:table-cell-properties fo:background-color="#33cc66" style:cell-protect="protected" style:print-content="true" gnm:background-colour="#33cc66" gnm:pattern="1"/>
    </style:style>
    <style:style style:name="Gnumeric-3" style:family="table-cell" style:parent-style-name="Default">
      <style:table-cell-properties fo:background-color="#e6e64c" style:cell-protect="protected" style:print-content="true" gnm:background-colour="#e6e64c" gnm:pattern="1"/>
    </style:style>
    <style:style style:name="Gnumeric-4" style:family="table-cell" style:parent-style-name="Default">
      <style:table-cell-properties fo:background-color="#e6e64c" style:cell-protect="protected" style:print-content="true" gnm:background-colour="#e6e64c" gnm:pattern="1"/>
    </style:style>
    <style:style style:name="Gnumeric-5" style:family="table-cell" style:parent-style-name="Default">
      <style:table-cell-properties fo:background-color="#ffff99" style:cell-protect="protected" style:print-content="true" gnm:background-colour="#ffff99" gnm:pattern="1"/>
    </style:style>
    <style:style style:name="Gnumeric-6" style:family="table-cell" style:parent-style-name="Default">
      <style:table-cell-properties fo:background-color="#7da647" style:cell-protect="protected" style:print-content="true" gnm:background-colour="#7da647" gnm:pattern="1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Estado_5f_Terminado" style:display-name="Estado_Terminado" style:family="table-cell" style:parent-style-name="Gnumeric-1">
      <style:table-cell-properties fo:background-color="#dddddd"/>
      <style:text-properties style:text-line-through-style="none" style:text-line-through-type="none"/>
    </style:style>
    <style:style style:name="PR_5f_Alta" style:display-name="PR_Alta" style:family="table-cell" style:parent-style-name="Gnumeric-1">
      <style:table-cell-properties fo:background-color="#ff0000"/>
    </style:style>
    <style:style style:name="PR_5f_Media" style:display-name="PR_Media" style:family="table-cell" style:parent-style-name="Gnumeric-1">
      <style:table-cell-properties fo:background-color="#d27e2b"/>
    </style:style>
    <style:style style:name="PR_5f_Baja" style:display-name="PR_Baja" style:family="table-cell" style:parent-style-name="Gnumeric-1">
      <style:table-cell-properties fo:background-color="#bebd3f" loext:vertical-justify="auto"/>
      <style:paragraph-properties css3t:text-justify="auto"/>
    </style:style>
    <style:style style:name="Estado_5f_Terminado_5f_Tachado" style:display-name="Estado_Terminado_Tachado" style:family="table-cell" style:parent-style-name="Estado_5f_Terminado">
      <style:text-properties style:text-line-through-style="solid" style:text-line-through-type="sing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1mm" fo:margin-left="0mm" fo:margin-right="0mm" fo:margin-bottom="0mm" fo:border="none" fo:padding="0mm" style:shadow="none"/>
      </style:header-style>
      <style:footer-style>
        <style:header-footer-properties fo:min-height="7.51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20:56:35.5721332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cfg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DiHA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Estructura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DiHA-02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VCCr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ToDo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Bugs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ExpandPlus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Hoja2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0T20:57:59.143330635</dc:date>
    <meta:creation-date>2008-01-12T19:26:13Z</meta:creation-date>
    <meta:editing-cycles>1711</meta:editing-cycles>
    <meta:editing-duration>P70DT10H56M6S</meta:editing-duration>
    <meta:generator>LibreOffice/5.3.7.2.0$Linux_X86_64 LibreOffice_project/30m0$Build-2</meta:generator>
    <meta:initial-creator>Martin Bellanca</meta:initial-creator>
    <meta:document-statistic meta:table-count="3" meta:cell-count="38" meta:object-count="0"/>
    <meta:user-defined meta:name="Info 1"/>
    <meta:user-defined meta:name="Info 2"/>
    <meta:user-defined meta:name="Info 3"/>
    <meta:user-defined meta:name="Info 4"/>
  </office:meta>
</office:document-meta>
</file>